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2"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P1" style:family="paragraph" style:parent-style-name="Standard">
      <style:paragraph-properties fo:margin-left="0in" fo:margin-right="0in" fo:line-height="150%" fo:text-align="center" style:justify-single-word="false" fo:text-indent="0.5in" style:auto-text-indent="false"/>
      <style:text-properties fo:color="#1f1f1f" style:font-name="Consolas" fo:font-size="15pt" style:text-underline-style="solid" style:text-underline-width="auto" style:text-underline-color="font-color" fo:font-weight="bold" style:font-name-asian="Consolas1" style:font-size-asian="15pt" style:font-weight-asian="bold" style:font-name-complex="Consolas1" style:font-size-complex="15pt" style:font-weight-complex="bold"/>
    </style:style>
    <style:style style:name="P2" style:family="paragraph" style:parent-style-name="Standard">
      <style:paragraph-properties fo:margin-left="0in" fo:margin-right="0in" fo:line-height="150%" fo:text-align="justify" style:justify-single-word="false" fo:text-indent="0.5in" style:auto-text-indent="false" fo:padding="0in" fo:border="none"/>
    </style:style>
    <style:style style:name="P3" style:family="paragraph" style:parent-style-name="Standard" style:master-page-name="Standard">
      <style:paragraph-properties fo:margin-left="0in" fo:margin-right="0in" fo:line-height="150%" fo:text-align="center" style:justify-single-word="false" fo:text-indent="0.5in" style:auto-text-indent="false" style:page-number="1"/>
    </style:style>
    <style:style style:name="P4" style:family="paragraph" style:parent-style-name="Standard" style:list-style-name="WWNum1">
      <style:paragraph-properties fo:margin-left="0.4098in" fo:margin-right="0in" fo:line-height="150%" fo:text-align="justify" style:justify-single-word="false" fo:text-indent="-0.25in" style:auto-text-indent="false" fo:padding="0in" fo:border="none"/>
    </style:style>
    <style:style style:name="P5" style:family="paragraph" style:parent-style-name="Standard" style:list-style-name="WWNum2">
      <style:paragraph-properties fo:margin-left="0.4098in" fo:margin-right="0in" fo:line-height="150%" fo:text-align="justify" style:justify-single-word="false" fo:text-indent="-0.25in" style:auto-text-indent="false" fo:padding="0in" fo:border="none"/>
    </style:style>
    <style:style style:name="P6" style:family="paragraph" style:parent-style-name="Standard" style:list-style-name="WWNum3">
      <style:paragraph-properties fo:margin-left="0.4098in" fo:margin-right="0in" fo:line-height="150%" fo:text-align="justify" style:justify-single-word="false" fo:text-indent="-0.25in" style:auto-text-indent="false" fo:padding="0in" fo:border="none"/>
    </style:style>
    <style:style style:name="P7" style:family="paragraph" style:parent-style-name="Standard" style:list-style-name="WWNum4">
      <style:paragraph-properties fo:margin-left="0.4098in" fo:margin-right="0in" fo:line-height="150%" fo:text-align="justify" style:justify-single-word="false" fo:text-indent="-0.25in" style:auto-text-indent="false" fo:padding="0in" fo:border="none"/>
    </style:style>
    <style:style style:name="P8" style:family="paragraph" style:parent-style-name="Standard" style:list-style-name="WWNum5">
      <style:paragraph-properties fo:margin-left="0.4098in" fo:margin-right="0in" fo:line-height="150%" fo:text-align="justify" style:justify-single-word="false" fo:text-indent="-0.25in" style:auto-text-indent="false" fo:padding="0in" fo:border="none"/>
    </style:style>
    <style:style style:name="P9" style:family="paragraph" style:parent-style-name="Standard" style:list-style-name="WWNum6">
      <style:paragraph-properties fo:margin-left="0.4098in" fo:margin-right="0in" fo:line-height="150%" fo:text-align="justify" style:justify-single-word="false" fo:text-indent="-0.25in" style:auto-text-indent="false" fo:padding="0in" fo:border="none"/>
    </style:style>
    <style:style style:name="P10" style:family="paragraph" style:parent-style-name="Standard" style:list-style-name="WWNum7">
      <style:paragraph-properties fo:margin-left="0.4098in" fo:margin-right="0in" fo:line-height="150%" fo:text-align="justify" style:justify-single-word="false" fo:text-indent="-0.25in" style:auto-text-indent="false" fo:padding="0in" fo:border="none"/>
    </style:style>
    <style:style style:name="P11" style:family="paragraph" style:parent-style-name="Standard" style:list-style-name="WWNum8">
      <style:paragraph-properties fo:margin-left="0.4098in" fo:margin-right="0in" fo:line-height="150%" fo:text-align="justify" style:justify-single-word="false" fo:text-indent="-0.25in" style:auto-text-indent="false" fo:padding="0in" fo:border="none"/>
    </style:style>
    <style:style style:name="P12" style:family="paragraph" style:parent-style-name="Standard">
      <style:paragraph-properties fo:margin-left="0in" fo:margin-right="0in" fo:line-height="150%" fo:text-align="justify" style:justify-single-word="false" fo:text-indent="0in" style:auto-text-indent="false" fo:padding="0in" fo:border="none"/>
      <style:text-properties fo:color="#1f1f1f" style:font-name="Consolas" style:font-name-asian="Consolas1" style:font-name-complex="Consolas1"/>
    </style:style>
    <style:style style:name="P13" style:family="paragraph" style:parent-style-name="Standard">
      <style:paragraph-properties fo:line-height="150%" fo:text-align="justify" style:justify-single-word="false" fo:padding="0in" fo:border="none"/>
      <style:text-properties fo:color="#1f1f1f" style:font-name="Consolas" fo:font-size="12pt" style:font-name-asian="Consolas1" style:font-size-asian="12pt" style:font-name-complex="Consolas1" style:font-size-complex="12pt"/>
    </style:style>
    <style:style style:name="P14" style:family="paragraph" style:parent-style-name="Standard">
      <style:paragraph-properties fo:line-height="150%" fo:text-align="justify" style:justify-single-word="false" fo:padding="0in" fo:border="none"/>
      <style:text-properties fo:color="#1f1f1f" style:font-name="Consolas" style:font-name-asian="Consolas1" style:font-name-complex="Consolas1"/>
    </style:style>
    <style:style style:name="P15" style:family="paragraph" style:parent-style-name="Standard">
      <style:paragraph-properties fo:line-height="150%" fo:text-align="justify" style:justify-single-word="false" fo:padding="0in" fo:border="none"/>
    </style:style>
    <style:style style:name="P16" style:family="paragraph" style:parent-style-name="Heading_20_2">
      <style:paragraph-properties fo:margin-top="0in" fo:margin-bottom="0in" loext:contextual-spacing="false" fo:line-height="150%" fo:padding="0in" fo:border="none"/>
    </style:style>
    <style:style style:name="P17" style:family="paragraph" style:parent-style-name="Heading_20_2">
      <style:paragraph-properties fo:margin-top="0in" fo:margin-bottom="0in" loext:contextual-spacing="false" fo:line-height="150%" fo:text-align="justify" style:justify-single-word="false" fo:padding="0in" fo:border="none"/>
    </style:style>
    <style:style style:name="P18" style:family="paragraph" style:parent-style-name="Heading_20_2">
      <style:paragraph-properties fo:margin-top="0in" fo:margin-bottom="0in" loext:contextual-spacing="false" fo:line-height="150%" fo:text-align="justify" style:justify-single-word="false" fo:padding="0in" fo:border="none"/>
      <style:text-properties fo:color="#1f1f1f" style:font-name="Consolas" fo:font-size="14pt" style:font-name-asian="Consolas1" style:font-size-asian="14pt" style:font-name-complex="Consolas1" style:font-size-complex="14pt"/>
    </style:style>
    <style:style style:name="P19" style:family="paragraph" style:parent-style-name="Heading_20_2">
      <loext:graphic-properties draw:fill="solid" draw:fill-color="#100d23"/>
      <style:paragraph-properties fo:margin-top="0in" fo:margin-bottom="0in" loext:contextual-spacing="false" fo:line-height="135%" fo:text-align="justify" style:justify-single-word="false" fo:background-color="#100d23"/>
      <style:text-properties fo:color="#6766b3" style:font-name="Courier New" fo:font-size="10.5pt" fo:font-style="italic" fo:font-weight="normal" style:font-name-asian="Courier New1" style:font-size-asian="10.5pt" style:font-style-asian="italic" style:font-weight-asian="normal" style:font-name-complex="Courier New1" style:font-size-complex="10.5pt" style:font-style-complex="italic" style:font-weight-complex="normal"/>
    </style:style>
    <style:style style:name="P20" style:family="paragraph" style:parent-style-name="Heading_20_2">
      <loext:graphic-properties draw:fill="solid" draw:fill-color="#100d23"/>
      <style:paragraph-properties fo:margin-top="0in" fo:margin-bottom="0in" loext:contextual-spacing="false" fo:line-height="135%" fo:background-color="#100d23"/>
    </style:style>
    <style:style style:name="P21" style:family="paragraph" style:parent-style-name="Heading_20_2">
      <loext:graphic-properties draw:fill="solid" draw:fill-color="#100d23"/>
      <style:paragraph-properties fo:margin-top="0in" fo:margin-bottom="0in" loext:contextual-spacing="false" fo:line-height="135%" fo:background-color="#100d23"/>
      <style:text-properties fo:color="#00ff9c" style:font-name="Courier New" fo:font-size="10.5pt" fo:font-weight="normal" style:font-name-asian="Courier New1" style:font-size-asian="10.5pt" style:font-weight-asian="normal" style:font-name-complex="Courier New1" style:font-size-complex="10.5pt" style:font-weight-complex="normal"/>
    </style:style>
    <style:style style:name="P22" style:family="paragraph" style:parent-style-name="Heading_20_3">
      <style:paragraph-properties fo:margin-top="0in" fo:margin-bottom="0.1665in" loext:contextual-spacing="false" fo:line-height="150%" fo:text-align="justify" style:justify-single-word="false" fo:padding="0in" fo:border="none"/>
    </style:style>
    <style:style style:name="T1" style:family="text">
      <style:text-properties fo:color="#1f1f1f" style:font-name="Consolas" fo:font-size="15pt" style:text-underline-style="solid" style:text-underline-width="auto" style:text-underline-color="font-color" fo:font-weight="bold" style:font-name-asian="Consolas1" style:font-size-asian="15pt" style:font-weight-asian="bold" style:font-name-complex="Consolas1" style:font-size-complex="15pt" style:font-weight-complex="bold"/>
    </style:style>
    <style:style style:name="T2" style:family="text">
      <style:text-properties fo:color="#1f1f1f" style:font-name="Consolas" fo:font-size="12pt" style:font-name-asian="Consolas1" style:font-size-asian="12pt" style:font-name-complex="Consolas1" style:font-size-complex="12pt"/>
    </style:style>
    <style:style style:name="T3" style:family="text">
      <style:text-properties fo:color="#1f1f1f" style:font-name="Consolas" fo:font-size="12pt" fo:font-weight="bold" style:font-name-asian="Consolas1" style:font-size-asian="12pt" style:font-weight-asian="bold" style:font-name-complex="Consolas1" style:font-size-complex="12pt" style:font-weight-complex="bold"/>
    </style:style>
    <style:style style:name="T4" style:family="text">
      <style:text-properties fo:color="#1f1f1f" style:font-name="Consolas" fo:font-size="12pt" fo:font-style="italic" style:font-name-asian="Consolas1" style:font-size-asian="12pt" style:font-style-asian="italic" style:font-name-complex="Consolas1" style:font-size-complex="12pt" style:font-style-complex="italic"/>
    </style:style>
    <style:style style:name="T5" style:family="text">
      <style:text-properties fo:color="#1f1f1f" style:font-name="Consolas" style:font-name-asian="Consolas1" style:font-name-complex="Consolas1"/>
    </style:style>
    <style:style style:name="T6" style:family="text">
      <style:text-properties fo:color="#1f1f1f" style:font-name="Consolas" fo:font-size="14pt" style:font-name-asian="Consolas1" style:font-size-asian="14pt" style:font-name-complex="Consolas1" style:font-size-complex="14pt"/>
    </style:style>
    <style:style style:name="T7" style:family="text">
      <style:text-properties fo:color="#d57bff" style:font-name="Courier New" fo:font-size="10.5pt" fo:font-style="italic" fo:font-weight="normal" style:font-name-asian="Courier New1" style:font-size-asian="10.5pt" style:font-style-asian="italic" style:font-weight-asian="normal" style:font-name-complex="Courier New1" style:font-size-complex="10.5pt" style:font-style-complex="italic" style:font-weight-complex="normal"/>
    </style:style>
    <style:style style:name="T8" style:family="text">
      <style:text-properties fo:color="#d57bff" style:font-name="Courier New" fo:font-size="10.5pt" fo:font-weight="normal" style:font-name-asian="Courier New1" style:font-size-asian="10.5pt" style:font-weight-asian="normal" style:font-name-complex="Courier New1" style:font-size-complex="10.5pt" style:font-weight-complex="normal"/>
    </style:style>
    <style:style style:name="T9" style:family="text">
      <style:text-properties fo:color="#00b0ff" style:font-name="Courier New" fo:font-size="10.5pt" fo:font-weight="normal" style:font-name-asian="Courier New1" style:font-size-asian="10.5pt" style:font-weight-asian="normal" style:font-name-complex="Courier New1" style:font-size-complex="10.5pt" style:font-weight-complex="normal"/>
    </style:style>
    <style:style style:name="T10" style:family="text">
      <style:text-properties fo:color="#00ff9c" style:font-name="Courier New" fo:font-size="10.5pt" fo:font-weight="normal" style:font-name-asian="Courier New1" style:font-size-asian="10.5pt" style:font-weight-asian="normal" style:font-name-complex="Courier New1" style:font-size-complex="10.5pt" style:font-weight-complex="normal"/>
    </style:style>
    <style:style style:name="T11" style:family="text">
      <style:text-properties fo:color="#76c1ff" style:font-name="Courier New" fo:font-size="10.5pt" fo:font-weight="normal" style:font-name-asian="Courier New1" style:font-size-asian="10.5pt" style:font-weight-asian="normal" style:font-name-complex="Courier New1" style:font-size-complex="10.5pt" style:font-weight-complex="normal"/>
    </style:style>
    <style:style style:name="T12" style:family="text">
      <style:text-properties fo:color="#6766b3" style:font-name="Courier New" fo:font-size="10.5pt" fo:font-style="italic" fo:font-weight="normal" style:font-name-asian="Courier New1" style:font-size-asian="10.5pt" style:font-style-asian="italic" style:font-weight-asian="normal" style:font-name-complex="Courier New1" style:font-size-complex="10.5pt" style:font-style-complex="italic" style:font-weight-complex="normal"/>
    </style:style>
    <style:style style:name="T13" style:family="text">
      <style:text-properties fo:color="#fffc58" style:font-name="Courier New" fo:font-size="10.5pt" fo:font-weight="normal" style:font-name-asian="Courier New1" style:font-size-asian="10.5pt" style:font-weight-asian="normal" style:font-name-complex="Courier New1" style:font-size-complex="10.5pt" style:font-weight-complex="normal"/>
    </style:style>
    <style:style style:name="T1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Análisis del componente servidor HTTP</text:span></text:p>
      <text:p text:style-name="P1"/>
      <text:p text:style-name="P2"><text:span text:style-name="T2">A continuación se presenta la documentación detallada y estructurada en bloques lógicos del componente de servidor HTTP. Se ha priorizado la explicación de las decisiones arquitectónicas de bajo nivel y el flujo de memoria.</text:span><text:span text:style-name="T5"><text:line-break/></text:span></text:p>
      <text:p text:style-name="P17"><text:span text:style-name="T6">1. Contrato Base: i_http_server.hpp<text:line-break/></text:span></text:p>
      <text:p text:style-name="P19"/>
      <text:p text:style-name="P20"><text:span text:style-name="T9">#ifndef</text:span><text:span text:style-name="T10"> </text:span><text:span text:style-name="T9">I_HTTP_SERVER_HPP</text:span></text:p>
      <text:p text:style-name="P20"><text:span text:style-name="T9">#define</text:span><text:span text:style-name="T10"> </text:span><text:span text:style-name="T9">I_HTTP_SERVER_HPP</text:span></text:p>
      <text:p text:style-name="P21"/>
      <text:p text:style-name="P20"><text:span text:style-name="T9">#include</text:span><text:span text:style-name="T10"> </text:span><text:span text:style-name="T9">"</text:span><text:span text:style-name="T11">i_component.hpp</text:span><text:span text:style-name="T9">"</text:span></text:p>
      <text:p text:style-name="P20"><text:span text:style-name="T9">#include</text:span><text:span text:style-name="T10"> </text:span><text:span text:style-name="T9">"</text:span><text:span text:style-name="T11">http_types.hpp</text:span><text:span text:style-name="T9">"</text:span><text:span text:style-name="T10"> </text:span></text:p>
      <text:p text:style-name="P20"><text:span text:style-name="T9">#include</text:span><text:span text:style-name="T10"> </text:span><text:span text:style-name="T9">&lt;</text:span><text:span text:style-name="T11">functional</text:span><text:span text:style-name="T9">&gt;</text:span></text:p>
      <text:p text:style-name="P20"><text:span text:style-name="T9">#include</text:span><text:span text:style-name="T10"> </text:span><text:span text:style-name="T9">&lt;</text:span><text:span text:style-name="T11">string</text:span><text:span text:style-name="T9">&gt;</text:span></text:p>
      <text:p text:style-name="P21"/>
      <text:p text:style-name="P20"><text:span text:style-name="T13">using</text:span><text:span text:style-name="T10"> RouteHandler </text:span><text:span text:style-name="T8">=</text:span><text:span text:style-name="T10"> std</text:span><text:span text:style-name="T9">::</text:span><text:span text:style-name="T10">function</text:span><text:span text:style-name="T9">&lt;</text:span><text:span text:style-name="T10">HttpResponse(</text:span><text:span text:style-name="T8">const</text:span><text:span text:style-name="T10"> HttpRequest</text:span><text:span text:style-name="T8">&amp;</text:span><text:span text:style-name="T10">)</text:span><text:span text:style-name="T9">&gt;;</text:span></text:p>
      <text:p text:style-name="P21"/>
      <text:p text:style-name="P20"><text:span text:style-name="T8">class</text:span><text:span text:style-name="T10"> IHttpServer </text:span><text:span text:style-name="T9">:</text:span><text:span text:style-name="T10"> </text:span><text:span text:style-name="T8">public</text:span><text:span text:style-name="T10"> IComponent</text:span></text:p>
      <text:p text:style-name="P20"><text:span text:style-name="T9">{</text:span></text:p>
      <text:p text:style-name="P20"><text:span text:style-name="T10"><text:s text:c="3"/></text:span><text:span text:style-name="T8">public</text:span><text:span text:style-name="T9">:</text:span></text:p>
      <text:p text:style-name="P20"><text:span text:style-name="T10"><text:s text:c="7"/></text:span><text:span text:style-name="T8">virtual</text:span><text:span text:style-name="T10"> </text:span><text:span text:style-name="T9">~IHttpServer()</text:span><text:span text:style-name="T10"> </text:span><text:span text:style-name="T8">noexcept</text:span><text:span text:style-name="T10"> </text:span><text:span text:style-name="T8">=</text:span><text:span text:style-name="T10"> </text:span><text:span text:style-name="T13">default</text:span><text:span text:style-name="T9">;</text:span></text:p>
      <text:p text:style-name="P20"><text:span text:style-name="T10"><text:s text:c="7"/></text:span><text:span text:style-name="T8">virtual</text:span><text:span text:style-name="T10"> ComponentResult </text:span><text:span text:style-name="T9">start(</text:span><text:span text:style-name="T8">int</text:span><text:span text:style-name="T10"> </text:span><text:span text:style-name="T13">port</text:span><text:span text:style-name="T9">)</text:span><text:span text:style-name="T10"> </text:span><text:span text:style-name="T8">noexcept</text:span><text:span text:style-name="T10"> </text:span><text:span text:style-name="T8">=</text:span><text:span text:style-name="T10"> </text:span><text:span text:style-name="T13">0</text:span><text:span text:style-name="T9">;</text:span></text:p>
      <text:p text:style-name="P20"><text:span text:style-name="T10"><text:s text:c="7"/></text:span><text:span text:style-name="T8">virtual</text:span><text:span text:style-name="T10"> </text:span><text:span text:style-name="T8">void</text:span><text:span text:style-name="T10"> </text:span><text:span text:style-name="T9">stop()</text:span><text:span text:style-name="T10"> </text:span><text:span text:style-name="T8">noexcept</text:span><text:span text:style-name="T10"> </text:span><text:span text:style-name="T8">=</text:span><text:span text:style-name="T10"> </text:span><text:span text:style-name="T13">0</text:span><text:span text:style-name="T9">;</text:span></text:p>
      <text:p text:style-name="P20"><text:span text:style-name="T9"><text:s text:c="7"/></text:span><text:span text:style-name="T8">virtual</text:span><text:span text:style-name="T10"> </text:span><text:span text:style-name="T8">void</text:span><text:span text:style-name="T10"> </text:span><text:span text:style-name="T9">add_route(</text:span><text:span text:style-name="T8">const</text:span><text:span text:style-name="T10"> std</text:span><text:span text:style-name="T9">::</text:span><text:span text:style-name="T10">string</text:span><text:span text:style-name="T8">&amp;</text:span><text:span text:style-name="T10"> </text:span><text:span text:style-name="T13">method</text:span><text:span text:style-name="T9">,</text:span><text:span text:style-name="T10"> </text:span><text:span text:style-name="T8">const</text:span><text:span text:style-name="T10"> std</text:span><text:span text:style-name="T9">::</text:span><text:span text:style-name="T10">string</text:span><text:span text:style-name="T8">&amp;</text:span><text:span text:style-name="T10"> </text:span><text:span text:style-name="T13">path</text:span><text:span text:style-name="T9">,</text:span><text:span text:style-name="T10"> RouteHandler </text:span><text:span text:style-name="T13">handler</text:span><text:span text:style-name="T9">)</text:span><text:span text:style-name="T10"> </text:span><text:span text:style-name="T8">=</text:span><text:span text:style-name="T10"> </text:span><text:span text:style-name="T13">0</text:span><text:span text:style-name="T9">;</text:span></text:p>
      <text:p text:style-name="P21"/>
      <text:p text:style-name="P20"><text:span text:style-name="T12"><text:s text:c="7"/>// Fachadas semánticas (Sugar Syntax)</text:span></text:p>
      <text:p text:style-name="P20"><text:span text:style-name="T10"><text:s text:c="7"/></text:span><text:span text:style-name="T8">virtual</text:span><text:span text:style-name="T10"> </text:span><text:span text:style-name="T8">void</text:span><text:span text:style-name="T10"> </text:span><text:span text:style-name="T9">get(</text:span><text:span text:style-name="T8">const</text:span><text:span text:style-name="T10"> std</text:span><text:span text:style-name="T9">::</text:span><text:span text:style-name="T10">string</text:span><text:span text:style-name="T8">&amp;</text:span><text:span text:style-name="T10"> </text:span><text:span text:style-name="T13">path</text:span><text:span text:style-name="T9">,</text:span><text:span text:style-name="T10"> RouteHandler </text:span><text:span text:style-name="T13">h</text:span><text:span text:style-name="T9">)</text:span><text:span text:style-name="T10"> </text:span><text:span text:style-name="T8">=</text:span><text:span text:style-name="T10"> </text:span><text:span text:style-name="T13">0</text:span><text:span text:style-name="T9">;</text:span></text:p>
      <text:p text:style-name="P20"><text:soft-page-break/><text:span text:style-name="T10"><text:s text:c="7"/></text:span><text:span text:style-name="T8">virtual</text:span><text:span text:style-name="T10"> </text:span><text:span text:style-name="T8">void</text:span><text:span text:style-name="T10"> </text:span><text:span text:style-name="T9">post(</text:span><text:span text:style-name="T8">const</text:span><text:span text:style-name="T10"> std</text:span><text:span text:style-name="T9">::</text:span><text:span text:style-name="T10">string</text:span><text:span text:style-name="T8">&amp;</text:span><text:span text:style-name="T10"> </text:span><text:span text:style-name="T13">path</text:span><text:span text:style-name="T9">,</text:span><text:span text:style-name="T10"> RouteHandler </text:span><text:span text:style-name="T13">h</text:span><text:span text:style-name="T9">)</text:span><text:span text:style-name="T10"> </text:span><text:span text:style-name="T8">=</text:span><text:span text:style-name="T10"> </text:span><text:span text:style-name="T13">0</text:span><text:span text:style-name="T9">;</text:span></text:p>
      <text:p text:style-name="P20"><text:span text:style-name="T10"><text:s text:c="7"/></text:span><text:span text:style-name="T8">virtual</text:span><text:span text:style-name="T10"> </text:span><text:span text:style-name="T8">void</text:span><text:span text:style-name="T10"> </text:span><text:span text:style-name="T9">put(</text:span><text:span text:style-name="T8">const</text:span><text:span text:style-name="T10"> std</text:span><text:span text:style-name="T9">::</text:span><text:span text:style-name="T10">string</text:span><text:span text:style-name="T8">&amp;</text:span><text:span text:style-name="T10"> </text:span><text:span text:style-name="T13">path</text:span><text:span text:style-name="T9">,</text:span><text:span text:style-name="T10"> RouteHandler </text:span><text:span text:style-name="T13">h</text:span><text:span text:style-name="T9">)</text:span><text:span text:style-name="T10"> </text:span><text:span text:style-name="T8">=</text:span><text:span text:style-name="T10"> </text:span><text:span text:style-name="T13">0</text:span><text:span text:style-name="T9">;</text:span></text:p>
      <text:p text:style-name="P20"><text:span text:style-name="T10"><text:s text:c="7"/></text:span><text:span text:style-name="T8">virtual</text:span><text:span text:style-name="T10"> </text:span><text:span text:style-name="T8">void</text:span><text:span text:style-name="T10"> </text:span><text:span text:style-name="T9">del(</text:span><text:span text:style-name="T8">const</text:span><text:span text:style-name="T10"> std</text:span><text:span text:style-name="T9">::</text:span><text:span text:style-name="T10">string</text:span><text:span text:style-name="T8">&amp;</text:span><text:span text:style-name="T10"> </text:span><text:span text:style-name="T13">path</text:span><text:span text:style-name="T9">,</text:span><text:span text:style-name="T10"> RouteHandler </text:span><text:span text:style-name="T13">h</text:span><text:span text:style-name="T9">)</text:span><text:span text:style-name="T10"> </text:span><text:span text:style-name="T8">=</text:span><text:span text:style-name="T10"> </text:span><text:span text:style-name="T13">0</text:span><text:span text:style-name="T9">;</text:span></text:p>
      <text:p text:style-name="P20"><text:span text:style-name="T10"><text:s text:c="7"/></text:span><text:span text:style-name="T8">virtual</text:span><text:span text:style-name="T10"> </text:span><text:span text:style-name="T8">void</text:span><text:span text:style-name="T10"> </text:span><text:span text:style-name="T9">patch(</text:span><text:span text:style-name="T8">const</text:span><text:span text:style-name="T10"> std</text:span><text:span text:style-name="T9">::</text:span><text:span text:style-name="T10">string</text:span><text:span text:style-name="T8">&amp;</text:span><text:span text:style-name="T10"> </text:span><text:span text:style-name="T13">path</text:span><text:span text:style-name="T9">,</text:span><text:span text:style-name="T10"> RouteHandler </text:span><text:span text:style-name="T13">h</text:span><text:span text:style-name="T9">)</text:span><text:span text:style-name="T10"> </text:span><text:span text:style-name="T8">=</text:span><text:span text:style-name="T10"> </text:span><text:span text:style-name="T13">0</text:span><text:span text:style-name="T9">;</text:span></text:p>
      <text:p text:style-name="P20"><text:span text:style-name="T10"><text:s text:c="7"/></text:span><text:span text:style-name="T8">virtual</text:span><text:span text:style-name="T10"> </text:span><text:span text:style-name="T8">void</text:span><text:span text:style-name="T10"> </text:span><text:span text:style-name="T9">serve_static(</text:span><text:span text:style-name="T8">const</text:span><text:span text:style-name="T10"> std</text:span><text:span text:style-name="T9">::</text:span><text:span text:style-name="T10">string</text:span><text:span text:style-name="T8">&amp;</text:span><text:span text:style-name="T10"> </text:span><text:span text:style-name="T13">route</text:span><text:span text:style-name="T9">,</text:span><text:span text:style-name="T10"> </text:span><text:span text:style-name="T8">const</text:span><text:span text:style-name="T10"> std</text:span><text:span text:style-name="T9">::</text:span><text:span text:style-name="T10">string</text:span><text:span text:style-name="T8">&amp;</text:span><text:span text:style-name="T10"> </text:span><text:span text:style-name="T13">filepath</text:span><text:span text:style-name="T9">,</text:span><text:span text:style-name="T10"> </text:span><text:span text:style-name="T8">const</text:span><text:span text:style-name="T10"> std</text:span><text:span text:style-name="T9">::</text:span><text:span text:style-name="T10">string</text:span><text:span text:style-name="T8">&amp;</text:span><text:span text:style-name="T10"> </text:span><text:span text:style-name="T13">content_type</text:span><text:span text:style-name="T9">)</text:span><text:span text:style-name="T10"> </text:span><text:span text:style-name="T8">=</text:span><text:span text:style-name="T10"> </text:span><text:span text:style-name="T13">0</text:span><text:span text:style-name="T9">;</text:span></text:p>
      <text:p text:style-name="P20"><text:span text:style-name="T9">};</text:span></text:p>
      <text:p text:style-name="P21"/>
      <text:p text:style-name="P20"><text:bookmark text:name="_dq9rv4bii8el"/><text:span text:style-name="T9">#endif</text:span><text:span text:style-name="T12"> // I_HTTP_SERVER_HPP</text:span></text:p>
      <text:p text:style-name="P18"/>
      <text:p text:style-name="P2"><text:span text:style-name="T2">Este archivo define la interfaz virtual pura que el Host (la aplicación principal) utilizará para interactuar con el componente sin conocer su implementación subyacente.</text:span></text:p>
      <text:list xml:id="list4287048717" text:style-name="WWNum1">
        <text:list-item>
          <text:p text:style-name="P4"><text:span text:style-name="T3">using RouteHandler = std::function&lt;HttpResponse(const HttpRequest&amp;)&gt;</text:span><text:span text:style-name="T2">: Define el tipo de dato para los </text:span><text:span text:style-name="T4">callbacks</text:span><text:span text:style-name="T2"> de enrutamiento. Exige que toda función que maneje una ruta reciba un DTO constante (HttpRequest) y retorne un DTO por valor (HttpResponse).</text:span></text:p>
        </text:list-item>
        <text:list-item>
          <text:p text:style-name="P4"><text:span text:style-name="T3">virtual ComponentResult start(int port) noexcept = 0;</text:span><text:span text:style-name="T2">: Inicia el ciclo de vida del servidor. El uso de noexcept prohíbe explícitamente que las excepciones de red (ej. fallos al abrir sockets) crucen la frontera del ABI. Todo debe resolverse en un código de retorno ComponentResult.</text:span></text:p>
        </text:list-item>
        <text:list-item>
          <text:p text:style-name="P4"><text:span text:style-name="T3">Fachadas Semánticas (get, post, etc.)</text:span><text:span text:style-name="T2">: Proveen "azúcar sintáctico" (Syntactic Sugar) para registrar manejadores sin tener que pasar el verbo HTTP como un string en cada llamada</text:span><text:span text:style-name="T5">.<text:line-break/></text:span></text:p>
        </text:list-item>
      </text:list>
      <text:p text:style-name="P17"><text:span text:style-name="T6">2. Modelos de Transferencia de Datos: http_types.hpp</text:span></text:p>
      <text:p text:style-name="P2"><text:span text:style-name="T2">Contiene los Data Transfer Objects (DTO) responsables de transportar la información entre la red, la infraestructura y la lógica de negocio</text:span><text:span text:style-name="T5">.</text:span></text:p>
      <text:p text:style-name="P12"/>
      <text:p text:style-name="P22"><text:span text:style-name="T5">HttpRequest</text:span></text:p>
      <text:list xml:id="list645563679" text:style-name="WWNum2">
        <text:list-item>
          <text:p text:style-name="P5"><text:span text:style-name="T3">std::unordered_map&lt;std::string, std::string&gt; headers</text:span><text:span text:style-name="T2">: Almacena las cabeceras HTTP de forma asociativa para búsqueda rápida con complejidad O(1).</text:span></text:p>
        </text:list-item>
        <text:list-item>
          <text:p text:style-name="P5"><text:span text:style-name="T3">std::vector&lt;char&gt; body</text:span><text:span text:style-name="T2">: Decisión crítica de diseño. En lugar de usar std::string, se utiliza un vector de bytes crudos (char). Esto garantiza que el servidor sea "Binary-Safe", permitiendo la recepción de archivos PDF, imágenes o audio sin corromper los datos al encontrar caracteres nulos (\0).</text:span></text:p>
        </text:list-item>
      </text:list>
      <text:p text:style-name="P13"/>
      <text:p text:style-name="P22"><text:span text:style-name="T5">HttpResponse (Patrón Builder)</text:span></text:p>
      <text:list xml:id="list1492355313" text:style-name="WWNum3">
        <text:list-item>
          <text:p text:style-name="P6"><text:span text:style-name="T3">HttpResponse&amp; set_status(HttpStatusCode code)</text:span><text:span text:style-name="T2">: Retorna una referencia a la propia instancia (*this), lo que permite encadenar métodos de forma fluida: res.set_status(...).set_body(...).</text:span></text:p>
        </text:list-item>
        <text:list-item>
          <text:p text:style-name="P6"><text:span text:style-name="T3">set_file(const std::string&amp; filepath, const std::string&amp; content_type, size_t file_size)</text:span><text:span text:style-name="T2">: Prepara la respuesta para una transferencia eficiente (</text:span><text:span text:style-name="T4">Zero-Copy</text:span><text:span text:style-name="T2">). Registra la ruta en file_path_ e inyecta las cabeceras Content-Type y Content-Length en el mapa de cabeceras, sin cargar un solo byte del archivo en la memoria de la aplicación.</text:span><text:span text:style-name="T5"><text:line-break/></text:span></text:p>
        </text:list-item>
      </text:list>
      <text:p text:style-name="P17"><text:span text:style-name="T6">3. Utilidades Estáticas: http_parser.hpp</text:span></text:p>
      <text:p text:style-name="P15"><text:span text:style-name="T2">Este archivo contiene la lógica pura de procesamiento de cadenas.</text:span></text:p>
      <text:list xml:id="list2274290203" text:style-name="WWNum4">
        <text:list-item>
          <text:p text:style-name="P7"><text:span text:style-name="T3">url_decode</text:span><text:span text:style-name="T2">: Iterador de caracteres. Cuando encuentra un %, extrae los siguientes dos caracteres, los procesa a través de un std::istringstream en modo hexadecimal (std::hex) y los convierte a su equivalente ASCII (static_cast&lt;char&gt;). Vital para decodificar espacios (%20) o caracteres especiales en las URL.</text:span></text:p>
        </text:list-item>
        <text:list-item>
          <text:p text:style-name="P7"><text:soft-page-break/><text:span text:style-name="T3">parse_headers</text:span><text:span text:style-name="T2">: Recorre el bloque de cabeceras línea por línea. Separa la clave del valor utilizando los dos puntos (:) como delimitador. Aplica un trim básico eliminando los espacios sobrantes al inicio del valor (value.erase(...)).</text:span><text:span text:style-name="T5"><text:line-break/></text:span></text:p>
        </text:list-item>
      </text:list>
      <text:p text:style-name="P16"><text:span text:style-name="T6">4. Definición de la Infraestructura: http_server_component.hpp</text:span></text:p>
      <text:p text:style-name="P15"><text:span text:style-name="T2">Define la clase concreta y encapsula los recursos del sistema operativo.</text:span></text:p>
      <text:list xml:id="list3019960292" text:style-name="WWNum5">
        <text:list-item>
          <text:p text:style-name="P8"><text:span text:style-name="T3">class SocketRAII</text:span><text:span text:style-name="T2">: Implementa el patrón RAII (</text:span><text:span text:style-name="T4">Resource Acquisition Is Initialization</text:span><text:span text:style-name="T2">). Toma posesión de un descriptor de archivo nativo (un entero fd_) en su constructor. Su destructor invoca automáticamente close(fd_). Esto garantiza que los sockets de los clientes se cierren de manera determinista al salir del ámbito de ejecución, eliminando fugas de descriptores de archivo (</text:span><text:span text:style-name="T4">file descriptor leaks</text:span><text:span text:style-name="T2">).</text:span></text:p>
        </text:list-item>
        <text:list-item>
          <text:p text:style-name="P8"><text:span text:style-name="T3">std::unordered_map&lt;std::string, std::unordered_map&lt;std::string, RouteHandler&gt;&gt; routes_;</text:span><text:span text:style-name="T2">: Estructura de enrutamiento anidada. El mapa exterior indexa por verbo HTTP (ej. "GET"), y el mapa interior indexa por ruta (ej. "/api/contenidos").</text:span></text:p>
        </text:list-item>
        <text:list-item>
          <text:p text:style-name="P8"><text:span text:style-name="T3">std::atomic&lt;bool&gt; is_running_{false};</text:span><text:span text:style-name="T2">: Variable booleana thread-safe. Garantiza que múltiples hilos (el hilo principal y el hilo del servidor) puedan leer y modificar el estado de ejecución sin incurrir en condiciones de carrera.</text:span><text:span text:style-name="T5"><text:line-break/></text:span></text:p>
        </text:list-item>
      </text:list>
      <text:p text:style-name="P14"/>
      <text:p text:style-name="P17"><text:span text:style-name="T6">5. Lógica de Ejecución: http_server_component.cpp</text:span></text:p>
      <text:p text:style-name="P15"><text:span text:style-name="T2">Este es el núcleo operativo del componente, donde se interactúa directamente con la API POSIX de Linux/Unix.</text:span></text:p>
      <text:p text:style-name="P14"/>
      <text:p text:style-name="P22"><text:span text:style-name="T5">Ciclo de Vida y Configuración del Socket</text:span></text:p>
      <text:list xml:id="list2824660543" text:style-name="WWNum6">
        <text:list-item>
          <text:p text:style-name="P9"><text:span text:style-name="T3">server_fd_ = socket(AF_INET, SOCK_STREAM, 0);</text:span><text:span text:style-name="T2">: Solicita al kernel un descriptor de archivo para un socket IPv4 (AF_INET) de tipo TCP (SOCK_STREAM).</text:span></text:p>
        </text:list-item>
        <text:list-item>
          <text:p text:style-name="P9"><text:span text:style-name="T3">setsockopt(..., SO_REUSEADDR, ...)</text:span><text:span text:style-name="T2">: Opción crítica en el desarrollo de servidores. Indica al kernel que libere inmediatamente el puerto si el servidor se reinicia, evitando el error Address already in use cuando el socket aún permanece en estado TIME_WAIT.</text:span></text:p>
        </text:list-item>
        <text:list-item>
          <text:p text:style-name="P9"><text:span text:style-name="T3">std::thread(&amp;HttpServerComponent::listen_and_serve, this, port);</text:span><text:span text:style-name="T2">: Desacopla la ejecución. El hilo principal del Host regresa inmediatamente a main(), mientras el servidor entra en su bucle infinito en un subproceso.</text:span></text:p>
        </text:list-item>
        <text:list-item>
          <text:p text:style-name="P9"><text:span text:style-name="T3">shutdown(server_fd_, SHUT_RDWR); (dentro de stop)</text:span><text:span text:style-name="T2">: Interrumpe abruptamente las operaciones de lectura y escritura del socket principal. Esto obliga a la función bloqueante accept() a fallar inmediatamente y salir del bucle de espera, permitiendo un apagado limpio (</text:span><text:span text:style-name="T4">graceful shutdown</text:span><text:span text:style-name="T2">).</text:span></text:p>
        </text:list-item>
      </text:list>
      <text:p text:style-name="P14"/>
      <text:p text:style-name="P22"><text:span text:style-name="T5">Bucle de Aceptación (listen_and_serve)</text:span></text:p>
      <text:list xml:id="list3803132745" text:style-name="WWNum7">
        <text:list-item>
          <text:p text:style-name="P10"><text:span text:style-name="T3">int client_fd = accept(...)</text:span><text:span text:style-name="T2">: El hilo se suspende aquí pasivamente hasta que un cliente web intenta conectarse. Al ocurrir, el kernel despierta al hilo y devuelve un nuevo descriptor de archivo (client_fd) exclusivo para hablar con ese cliente.</text:span></text:p>
        </text:list-item>
        <text:list-item>
          <text:p text:style-name="P10"><text:span text:style-name="T3">std::thread(&amp;HttpServerComponent::process_client, this, client_fd).detach();</text:span><text:span text:style-name="T2">: Por cada cliente conectado, se lanza un hilo independiente. .detach() separa el hilo del control de la aplicación principal, permitiendo que viva por su cuenta y se autodestruya al terminar de procesar la petición.</text:span></text:p>
        </text:list-item>
      </text:list>
      <text:p text:style-name="P14"/>
      <text:p text:style-name="P14"/>
      <text:p text:style-name="P14"/>
      <text:p text:style-name="P22"><text:span text:style-name="T5">Procesamiento de la Petición (process_client)</text:span></text:p>
      <text:list xml:id="list3979500073" text:style-name="WWNum8">
        <text:list-item>
          <text:p text:style-name="P11"><text:span text:style-name="T3">Etapa 1 (Lectura de Cabeceras):</text:span><text:span text:style-name="T2"> Lee bloques de 1024 bytes del socket hasta que detecta la secuencia de terminación del protocolo HTTP estándar: \r\n\r\n. Todo lo anterior conforma la línea de control (Verbo y URL) y las cabeceras.</text:span></text:p>
        </text:list-item>
        <text:list-item>
          <text:p text:style-name="P11"><text:span text:style-name="T3">Etapa 2 (Lectura del Cuerpo):</text:span><text:span text:style-name="T2"> Extrae la cabecera Content-Length. Si el tamaño del cuerpo es mayor a los bytes sobrantes leídos en la primera etapa, entra en un bucle while iterativo llamando a read(...) hasta consumir exactamente los bytes declarados. Esto previene que el servidor se quede bloqueado esperando datos infinitamente o que lea datos incompletos.</text:span></text:p>
        </text:list-item>
        <text:list-item>
          <text:p text:style-name="P11"><text:span text:style-name="T3">Etapa 3 (Enrutamiento Dinámico):</text:span><text:span text:style-name="T2"> Busca una coincidencia exacta de la ruta en el mapa routes_. Si falla, itera sobre las rutas registradas buscando comodines (*) al final. Compara prefijos utilizando req.path.find(prefix) == 0.</text:span></text:p>
        </text:list-item>
        <text:list-item>
          <text:p text:style-name="P11"><text:soft-page-break/><text:span text:style-name="T3">Etapa 4 (Envío de Cabeceras):</text:span><text:span text:style-name="T2"> Serializa las cabeceras generadas en el objeto HttpResponse a una cadena de texto plana y las envía por el socket al cliente mediante la función send().</text:span></text:p>
        </text:list-item>
        <text:list-item>
          <text:p text:style-name="P11"><text:span text:style-name="T3">Etapa 5 (Zero-Copy Transfer):</text:span><text:span text:style-name="T2"> Si se configuró un archivo físico, se abre un descriptor de solo lectura (O_RDONLY). Se invoca sendfile(...), lo que ordena al DMA (</text:span><text:span text:style-name="T4">Direct Memory Access</text:span><text:span text:style-name="T2">) del hardware y al kernel mover los bloques del disco directamente a la tarjeta de red, evadiendo la copia hacia el espacio de usuario (RAM de tu programa).</text:span></text:p>
        </text:list-item>
        <text:list-item>
          <text:p text:style-name="P11"><text:span text:style-name="T3">Etapa 6 (Logueo Seguro):</text:span><text:span text:style-name="T2"> std::lock_guard&lt;std::mutex&gt; lock(console_mutex_) toma el control de un candado de exclusión mutua. Como hay múltiples hilos procesando clientes al mismo tiempo, esto evita que los textos en std::cout se sobreescriban e intercalen de forma ilegible en la terminal. Al salir del ámbito de la función, el lock_guard se destruye y libera el candado automáticament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font-style-complex="normal" style:font-weight-complex="bold"/>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font-style-complex="normal" style:font-weight-complex="bold"/>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font-style-complex="normal" style:font-weight-complex="bold"/>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font-style-complex="normal" style:font-weight-complex="bold"/>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font-style-complex="normal"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ListLabel_20_1" style:display-name="ListLabel 1" style:family="text">
      <style:text-properties fo:font-variant="normal" fo:text-transform="none" fo:color="#000000" style:text-line-through-style="none" style:text-line-through-type="none" style:text-position="0% 100%" fo:font-size="12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 style:display-name="ListLabel 10" style:family="text">
      <style:text-properties fo:font-variant="normal" fo:text-transform="none" fo:color="#000000" style:text-line-through-style="none" style:text-line-through-type="none" style:text-position="0% 100%" fo:font-size="12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 style:display-name="ListLabel 19" style:family="text">
      <style:text-properties fo:font-variant="normal" fo:text-transform="none" fo:color="#000000" style:text-line-through-style="none" style:text-line-through-type="none" style:text-position="0% 100%" fo:font-size="12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 style:display-name="ListLabel 28" style:family="text">
      <style:text-properties fo:font-variant="normal" fo:text-transform="none" fo:color="#000000" style:text-line-through-style="none" style:text-line-through-type="none" style:text-position="0% 100%" fo:font-size="12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7" style:display-name="ListLabel 37" style:family="text">
      <style:text-properties fo:font-variant="normal" fo:text-transform="none" fo:color="#000000" style:text-line-through-style="none" style:text-line-through-type="none" style:text-position="0% 100%" fo:font-size="12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6" style:display-name="ListLabel 46" style:family="text">
      <style:text-properties fo:font-variant="normal" fo:text-transform="none" fo:color="#000000" style:text-line-through-style="none" style:text-line-through-type="none" style:text-position="0% 100%" fo:font-size="12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5" style:display-name="ListLabel 55" style:family="text">
      <style:text-properties fo:font-variant="normal" fo:text-transform="none" fo:color="#000000" style:text-line-through-style="none" style:text-line-through-type="none" style:text-position="0% 100%" fo:font-size="12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4" style:display-name="ListLabel 64" style:family="text">
      <style:text-properties fo:font-variant="normal" fo:text-transform="none" fo:color="#000000" style:text-line-through-style="none" style:text-line-through-type="none" style:text-position="0% 100%" fo:font-size="12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4098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4098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4098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4098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4098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4098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4098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4098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3929in" fo:margin-bottom="0.3929in" fo:margin-left="0.3929in" fo:margin-right="0.3929in" style:writing-mode="lr-tb" style:layout-grid-color="#c0c0c0" style:layout-grid-lines="2594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64" meta:word-count="1205" meta:character-count="8538" meta:non-whitespace-character-count="7334"/>
    <meta:generator>LibreOfficeDev/6.0.5.2$Linux_X86_64 LibreOffice_project/</meta:generator>
  </office:meta>
</office:document-meta>
</file>