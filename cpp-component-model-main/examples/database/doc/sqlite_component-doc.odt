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loext:graphic-properties draw:fill="solid" draw:fill-color="#100d23"/>
      <style:paragraph-properties fo:line-height="135%" fo:background-color="#100d23"/>
    </style:style>
    <style:style style:name="P2" style:family="paragraph" style:parent-style-name="Standard">
      <loext:graphic-properties draw:fill="solid" draw:fill-color="#100d23"/>
      <style:paragraph-properties fo:line-height="135%" fo:background-color="#100d23"/>
      <style:text-properties fo:color="#00ff9c" style:font-name="Courier New" fo:font-size="10.5pt" style:font-name-asian="Courier New1" style:font-size-asian="10.5pt" style:font-name-complex="Courier New1" style:font-size-complex="10.5pt"/>
    </style:style>
    <style:style style:name="P3" style:family="paragraph" style:parent-style-name="Standard">
      <style:paragraph-properties fo:margin-left="0in" fo:margin-right="0in" fo:line-height="150%" fo:text-align="justify" style:justify-single-word="false" fo:text-indent="0.5in" style:auto-text-indent="false" fo:padding="0in" fo:border="none"/>
    </style:style>
    <style:style style:name="P4" style:family="paragraph" style:parent-style-name="Standard">
      <style:paragraph-properties fo:margin-left="0in" fo:margin-right="0in" fo:line-height="150%" fo:text-align="justify" style:justify-single-word="false" fo:text-indent="0.5in" style:auto-text-indent="false" fo:padding="0in" fo:border="none"/>
      <style:text-properties fo:color="#1f1f1f" style:font-name="Consolas" style:font-name-asian="Consolas1" style:font-name-complex="Consolas1"/>
    </style:style>
    <style:style style:name="P5" style:family="paragraph" style:parent-style-name="Standard" style:master-page-name="Standard">
      <style:paragraph-properties fo:margin-left="0in" fo:margin-right="0in" fo:line-height="150%" fo:text-align="justify" style:justify-single-word="false" fo:text-indent="0.5in" style:auto-text-indent="false" style:page-number="1" fo:padding="0in" fo:border="none"/>
    </style:style>
    <style:style style:name="P6" style:family="paragraph" style:parent-style-name="Standard">
      <style:paragraph-properties fo:line-height="150%" fo:text-align="justify" style:justify-single-word="false" fo:padding="0in" fo:border="none"/>
    </style:style>
    <style:style style:name="P7" style:family="paragraph" style:parent-style-name="Standard">
      <style:paragraph-properties fo:line-height="150%" fo:text-align="justify" style:justify-single-word="false" fo:padding="0in" fo:border="none"/>
      <style:text-properties fo:color="#1f1f1f" style:font-name="Consolas" style:font-name-asian="Consolas1" style:font-name-complex="Consolas1"/>
    </style:style>
    <style:style style:name="P8" style:family="paragraph" style:parent-style-name="Standard">
      <style:paragraph-properties fo:line-height="150%" fo:text-align="justify" style:justify-single-word="false" fo:padding="0in" fo:border="none"/>
      <style:text-properties fo:color="#1f1f1f" style:font-name="Consolas" fo:font-size="12pt" style:font-name-asian="Consolas1" style:font-size-asian="12pt" style:font-name-complex="Consolas1" style:font-size-complex="12pt"/>
    </style:style>
    <style:style style:name="P9" style:family="paragraph" style:parent-style-name="Standard" style:list-style-name="WWNum1">
      <style:paragraph-properties fo:margin-left="0.4098in" fo:margin-right="0in" fo:line-height="150%" fo:text-align="justify" style:justify-single-word="false" fo:text-indent="-0.25in" style:auto-text-indent="false" fo:padding="0in" fo:border="none"/>
    </style:style>
    <style:style style:name="P10" style:family="paragraph" style:parent-style-name="Standard" style:list-style-name="WWNum2">
      <style:paragraph-properties fo:margin-left="0.4098in" fo:margin-right="0in" fo:line-height="150%" fo:text-align="justify" style:justify-single-word="false" fo:text-indent="-0.25in" style:auto-text-indent="false" fo:padding="0in" fo:border="none"/>
    </style:style>
    <style:style style:name="P11" style:family="paragraph" style:parent-style-name="Standard" style:list-style-name="WWNum3">
      <style:paragraph-properties fo:margin-left="0.4098in" fo:margin-right="0in" fo:line-height="150%" fo:text-align="justify" style:justify-single-word="false" fo:text-indent="-0.25in" style:auto-text-indent="false" fo:padding="0in" fo:border="none"/>
    </style:style>
    <style:style style:name="P12" style:family="paragraph" style:parent-style-name="Standard" style:list-style-name="WWNum4">
      <style:paragraph-properties fo:margin-left="0.4098in" fo:margin-right="0in" fo:line-height="150%" fo:text-align="justify" style:justify-single-word="false" fo:text-indent="-0.25in" style:auto-text-indent="false" fo:padding="0in" fo:border="none"/>
    </style:style>
    <style:style style:name="P13" style:family="paragraph" style:parent-style-name="Standard" style:list-style-name="WWNum6">
      <style:paragraph-properties fo:margin-left="0.4098in" fo:margin-right="0in" fo:line-height="150%" fo:text-align="justify" style:justify-single-word="false" fo:text-indent="-0.25in" style:auto-text-indent="false" fo:padding="0in" fo:border="none"/>
    </style:style>
    <style:style style:name="P14" style:family="paragraph" style:parent-style-name="Standard" style:list-style-name="WWNum5">
      <style:paragraph-properties fo:margin-left="0.4445in" fo:margin-right="0in" fo:line-height="150%" fo:text-align="justify" style:justify-single-word="false" fo:text-indent="-0.25in" style:auto-text-indent="false" fo:padding="0in" fo:border="none"/>
    </style:style>
    <style:style style:name="P15" style:family="paragraph" style:parent-style-name="Heading_20_2">
      <style:paragraph-properties fo:margin-top="0in" fo:margin-bottom="0in" loext:contextual-spacing="false" fo:line-height="150%" fo:text-align="justify" style:justify-single-word="false" fo:padding="0in" fo:border="none"/>
    </style:style>
    <style:style style:name="P16" style:family="paragraph" style:parent-style-name="Heading_20_3">
      <style:paragraph-properties fo:margin-top="0in" fo:margin-bottom="0.1665in" loext:contextual-spacing="false" fo:line-height="150%" fo:text-align="justify" style:justify-single-word="false" fo:padding="0in" fo:border="none"/>
    </style:style>
    <style:style style:name="T1" style:family="text">
      <style:text-properties fo:color="#1f1f1f" style:font-name="Consolas" fo:font-size="15pt" style:text-underline-style="solid" style:text-underline-width="auto" style:text-underline-color="font-color" fo:font-weight="bold" style:font-name-asian="Consolas1" style:font-size-asian="15pt" style:font-weight-asian="bold" style:font-name-complex="Consolas1" style:font-size-complex="15pt" style:font-weight-complex="bold"/>
    </style:style>
    <style:style style:name="T2" style:family="text">
      <style:text-properties fo:color="#1f1f1f" style:font-name="Consolas" fo:font-size="12pt" style:font-name-asian="Consolas1" style:font-size-asian="12pt" style:font-name-complex="Consolas1" style:font-size-complex="12pt"/>
    </style:style>
    <style:style style:name="T3" style:family="text">
      <style:text-properties fo:color="#1f1f1f" style:font-name="Consolas" fo:font-size="12pt" fo:font-weight="bold" style:font-name-asian="Consolas1" style:font-size-asian="12pt" style:font-weight-asian="bold" style:font-name-complex="Consolas1" style:font-size-complex="12pt" style:font-weight-complex="bold"/>
    </style:style>
    <style:style style:name="T4" style:family="text">
      <style:text-properties fo:color="#1f1f1f" style:font-name="Consolas" fo:font-size="12pt" fo:font-style="italic" style:font-name-asian="Consolas1" style:font-size-asian="12pt" style:font-style-asian="italic" style:font-name-complex="Consolas1" style:font-size-complex="12pt" style:font-style-complex="italic"/>
    </style:style>
    <style:style style:name="T5" style:family="text">
      <style:text-properties fo:color="#1f1f1f" style:font-name="Consolas" fo:font-size="14pt" style:font-name-asian="Consolas1" style:font-size-asian="14pt" style:font-name-complex="Consolas1" style:font-size-complex="14pt"/>
    </style:style>
    <style:style style:name="T6" style:family="text">
      <style:text-properties fo:color="#1f1f1f" style:font-name="Consolas" style:font-name-asian="Consolas1" style:font-name-complex="Consolas1"/>
    </style:style>
    <style:style style:name="T7" style:family="text">
      <style:text-properties fo:color="#00b0ff" style:font-name="Courier New" fo:font-size="10.5pt" style:font-name-asian="Courier New1" style:font-size-asian="10.5pt" style:font-name-complex="Courier New1" style:font-size-complex="10.5pt"/>
    </style:style>
    <style:style style:name="T8" style:family="text">
      <style:text-properties fo:color="#00ff9c" style:font-name="Courier New" fo:font-size="10.5pt" style:font-name-asian="Courier New1" style:font-size-asian="10.5pt" style:font-name-complex="Courier New1" style:font-size-complex="10.5pt"/>
    </style:style>
    <style:style style:name="T9" style:family="text">
      <style:text-properties fo:color="#76c1ff" style:font-name="Courier New" fo:font-size="10.5pt" style:font-name-asian="Courier New1" style:font-size-asian="10.5pt" style:font-name-complex="Courier New1" style:font-size-complex="10.5pt"/>
    </style:style>
    <style:style style:name="T10" style:family="text">
      <style:text-properties fo:color="#6766b3" style:font-name="Courier New" fo:font-size="10.5pt" fo:font-style="italic" style:font-name-asian="Courier New1" style:font-size-asian="10.5pt" style:font-style-asian="italic" style:font-name-complex="Courier New1" style:font-size-complex="10.5pt" style:font-style-complex="italic"/>
    </style:style>
    <style:style style:name="T11" style:family="text">
      <style:text-properties fo:color="#fffc58" style:font-name="Courier New" fo:font-size="10.5pt" style:font-name-asian="Courier New1" style:font-size-asian="10.5pt" style:font-name-complex="Courier New1" style:font-size-complex="10.5pt"/>
    </style:style>
    <style:style style:name="T12" style:family="text">
      <style:text-properties fo:color="#d57bff" style:font-name="Courier New" fo:font-size="10.5pt" style:font-name-asian="Courier New1" style:font-size-asian="10.5pt" style:font-name-complex="Courier New1" style:font-size-complex="10.5pt"/>
    </style:style>
    <style:style style:name="T13" style:family="text">
      <style:text-properties fo:font-size="12pt" style:font-size-asian="12pt" style:font-size-complex="12pt"/>
    </style:style>
    <style:style style:name="T14" style:family="text">
      <style:text-properties style:font-name="Consolas" fo:font-size="12pt" style:font-name-asian="Consolas1" style:font-size-asian="12pt" style:font-name-complex="Consola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nálisis del componente manejador de base de datos</text:span></text:p>
      <text:p text:style-name="P4"/>
      <text:p text:style-name="P3"><text:span text:style-name="T2">Este diseño encapsula la persistencia de datos asegurando que la aplicación anfitriona interactúe con una interfaz genérica, manteniendo el desacoplamiento y cumpliendo con los objetivos de eficiencia de recursos propios del modelo GREENSOFT.</text:span></text:p>
      <text:p text:style-name="P6"><text:span text:style-name="T2">A continuación, se detalla la documentación arquitectónica estructurada.</text:span></text:p>
      <text:p text:style-name="P7"/>
      <text:p text:style-name="P15"><text:span text:style-name="T5">1. Contrato Base: i_database.hpp</text:span></text:p>
      <text:p text:style-name="P1"><text:span text:style-name="T7">#ifndef</text:span><text:span text:style-name="T8"> </text:span><text:span text:style-name="T7">I_DATABASE_HPP</text:span></text:p>
      <text:p text:style-name="P1"><text:span text:style-name="T7">#define</text:span><text:span text:style-name="T8"> </text:span><text:span text:style-name="T7">I_DATABASE_HPP</text:span></text:p>
      <text:p text:style-name="P2"/>
      <text:p text:style-name="P1"><text:span text:style-name="T7">#include</text:span><text:span text:style-name="T8"> </text:span><text:span text:style-name="T7">"</text:span><text:span text:style-name="T9">i_component.hpp</text:span><text:span text:style-name="T7">"</text:span></text:p>
      <text:p text:style-name="P1"><text:span text:style-name="T7">#include</text:span><text:span text:style-name="T8"> </text:span><text:span text:style-name="T7">&lt;</text:span><text:span text:style-name="T9">string</text:span><text:span text:style-name="T7">&gt;</text:span></text:p>
      <text:p text:style-name="P1"><text:span text:style-name="T7">#include</text:span><text:span text:style-name="T8"> </text:span><text:span text:style-name="T7">&lt;</text:span><text:span text:style-name="T9">vector</text:span><text:span text:style-name="T7">&gt;</text:span></text:p>
      <text:p text:style-name="P1"><text:span text:style-name="T7">#include</text:span><text:span text:style-name="T8"> </text:span><text:span text:style-name="T7">&lt;</text:span><text:span text:style-name="T9">unordered_map</text:span><text:span text:style-name="T7">&gt;</text:span></text:p>
      <text:p text:style-name="P2"/>
      <text:p text:style-name="P1"><text:span text:style-name="T10">// Representación genérica de una fila: clave (columna) -&gt; valor (texto)</text:span></text:p>
      <text:p text:style-name="P1"><text:span text:style-name="T11">using</text:span><text:span text:style-name="T8"> DataRow </text:span><text:span text:style-name="T12">=</text:span><text:span text:style-name="T8"> std</text:span><text:span text:style-name="T7">::</text:span><text:span text:style-name="T8">unordered_map</text:span><text:span text:style-name="T7">&lt;</text:span><text:span text:style-name="T8">std</text:span><text:span text:style-name="T7">::</text:span><text:span text:style-name="T8">string</text:span><text:span text:style-name="T7">,</text:span><text:span text:style-name="T8"> std</text:span><text:span text:style-name="T7">::</text:span><text:span text:style-name="T8">string</text:span><text:span text:style-name="T7">&gt;;</text:span></text:p>
      <text:p text:style-name="P1"><text:span text:style-name="T11">using</text:span><text:span text:style-name="T8"> ResultSet </text:span><text:span text:style-name="T12">=</text:span><text:span text:style-name="T8"> std</text:span><text:span text:style-name="T7">::</text:span><text:span text:style-name="T8">vector</text:span><text:span text:style-name="T7">&lt;</text:span><text:span text:style-name="T8">DataRow</text:span><text:span text:style-name="T7">&gt;;</text:span></text:p>
      <text:p text:style-name="P2"/>
      <text:p text:style-name="P1"><text:span text:style-name="T12">class</text:span><text:span text:style-name="T8"> IDatabase </text:span><text:span text:style-name="T7">:</text:span><text:span text:style-name="T8"> </text:span><text:span text:style-name="T12">public</text:span><text:span text:style-name="T8"> IComponent</text:span></text:p>
      <text:p text:style-name="P1"><text:span text:style-name="T7">{</text:span></text:p>
      <text:p text:style-name="P1"><text:span text:style-name="T8"><text:s text:c="3"/></text:span><text:span text:style-name="T12">public</text:span><text:span text:style-name="T7">:</text:span></text:p>
      <text:p text:style-name="P1"><text:span text:style-name="T8"><text:s text:c="5"/></text:span><text:span text:style-name="T12">virtual</text:span><text:span text:style-name="T8"> </text:span><text:span text:style-name="T7">~IDatabase()</text:span><text:span text:style-name="T8"> </text:span><text:span text:style-name="T12">noexcept</text:span><text:span text:style-name="T8"> </text:span><text:span text:style-name="T12">=</text:span><text:span text:style-name="T8"> </text:span><text:span text:style-name="T11">default</text:span><text:span text:style-name="T7">;</text:span></text:p>
      <text:p text:style-name="P1"><text:span text:style-name="T8"><text:s text:c="5"/></text:span><text:span text:style-name="T12">virtual</text:span><text:span text:style-name="T8"> ComponentResult </text:span><text:span text:style-name="T7">connect(</text:span><text:span text:style-name="T12">const</text:span><text:span text:style-name="T8"> std</text:span><text:span text:style-name="T7">::</text:span><text:span text:style-name="T8">string</text:span><text:span text:style-name="T12">&amp;</text:span><text:span text:style-name="T8"> </text:span><text:span text:style-name="T11">connection_string</text:span><text:span text:style-name="T7">)</text:span><text:span text:style-name="T8"> </text:span><text:span text:style-name="T12">noexcept</text:span><text:span text:style-name="T8"> </text:span><text:span text:style-name="T12">=</text:span><text:span text:style-name="T8"> </text:span><text:span text:style-name="T11">0</text:span><text:span text:style-name="T7">;</text:span></text:p>
      <text:p text:style-name="P1"><text:span text:style-name="T8"><text:s text:c="5"/></text:span><text:span text:style-name="T12">virtual</text:span><text:span text:style-name="T8"> </text:span><text:span text:style-name="T12">void</text:span><text:span text:style-name="T8"> </text:span><text:span text:style-name="T7">disconnect()</text:span><text:span text:style-name="T8"> </text:span><text:span text:style-name="T12">noexcept</text:span><text:span text:style-name="T8"> </text:span><text:span text:style-name="T12">=</text:span><text:span text:style-name="T8"> </text:span><text:span text:style-name="T11">0</text:span><text:span text:style-name="T7">;</text:span></text:p>
      <text:p text:style-name="P1"><text:span text:style-name="T8"><text:s text:c="5"/></text:span><text:span text:style-name="T12">virtual</text:span><text:span text:style-name="T8"> ComponentResult </text:span><text:span text:style-name="T7">execute(</text:span><text:span text:style-name="T12">const</text:span><text:span text:style-name="T8"> std</text:span><text:span text:style-name="T7">::</text:span><text:span text:style-name="T8">string</text:span><text:span text:style-name="T12">&amp;</text:span><text:span text:style-name="T8"> </text:span><text:span text:style-name="T11">query</text:span><text:span text:style-name="T7">,</text:span><text:span text:style-name="T8"> </text:span><text:span text:style-name="T12">const</text:span><text:span text:style-name="T8"> std</text:span><text:span text:style-name="T7">::</text:span><text:span text:style-name="T8">vector</text:span><text:span text:style-name="T7">&lt;</text:span><text:span text:style-name="T8">std</text:span><text:span text:style-name="T7">::</text:span><text:span text:style-name="T8">string</text:span><text:span text:style-name="T7">&gt;</text:span><text:span text:style-name="T12">&amp;</text:span><text:span text:style-name="T8"> </text:span><text:span text:style-name="T11">params</text:span><text:span text:style-name="T7">)</text:span><text:span text:style-name="T8"> </text:span><text:span text:style-name="T12">noexcept</text:span><text:span text:style-name="T8"> </text:span><text:span text:style-name="T12">=</text:span><text:span text:style-name="T8"> </text:span><text:span text:style-name="T11">0</text:span><text:span text:style-name="T7">;</text:span></text:p>
      <text:p text:style-name="P1"><text:soft-page-break/><text:span text:style-name="T8"><text:s text:c="5"/></text:span><text:span text:style-name="T12">virtual</text:span><text:span text:style-name="T8"> ComponentResult </text:span><text:span text:style-name="T7">query(</text:span><text:span text:style-name="T12">const</text:span><text:span text:style-name="T8"> std</text:span><text:span text:style-name="T7">::</text:span><text:span text:style-name="T8">string</text:span><text:span text:style-name="T12">&amp;</text:span><text:span text:style-name="T8"> </text:span><text:span text:style-name="T11">query</text:span><text:span text:style-name="T7">,</text:span><text:span text:style-name="T8"> </text:span><text:span text:style-name="T12">const</text:span><text:span text:style-name="T8"> std</text:span><text:span text:style-name="T7">::</text:span><text:span text:style-name="T8">vector</text:span><text:span text:style-name="T7">&lt;</text:span><text:span text:style-name="T8">std</text:span><text:span text:style-name="T7">::</text:span><text:span text:style-name="T8">string</text:span><text:span text:style-name="T7">&gt;</text:span><text:span text:style-name="T12">&amp;</text:span><text:span text:style-name="T8"> </text:span><text:span text:style-name="T11">params</text:span><text:span text:style-name="T7">,</text:span><text:span text:style-name="T8"> ResultSet</text:span><text:span text:style-name="T12">&amp;</text:span><text:span text:style-name="T8"> </text:span><text:span text:style-name="T11">out_result</text:span><text:span text:style-name="T7">)</text:span><text:span text:style-name="T8"> </text:span><text:span text:style-name="T12">noexcept</text:span><text:span text:style-name="T8"> </text:span><text:span text:style-name="T12">=</text:span><text:span text:style-name="T8"> </text:span><text:span text:style-name="T11">0</text:span><text:span text:style-name="T7">;</text:span></text:p>
      <text:p text:style-name="P1"><text:span text:style-name="T7">};</text:span></text:p>
      <text:p text:style-name="P2"/>
      <text:p text:style-name="P1"><text:span text:style-name="T7">#endif</text:span><text:span text:style-name="T10"> // I_DATABASE_HPP</text:span></text:p>
      <text:p text:style-name="Standard"/>
      <text:p text:style-name="P6"><text:span text:style-name="T2">Este archivo establece la abstracción pura para cualquier motor de base de datos que se desee implementar en el futuro:</text:span></text:p>
      <text:list xml:id="list1019785624" text:style-name="WWNum1">
        <text:list-item>
          <text:p text:style-name="P9"><text:span text:style-name="T3">Estructuras de Datos Ligeras (DataRow y ResultSet)</text:span><text:span text:style-name="T2">: Se define DataRow como un alias de std::unordered_map&lt;std::string, std::string&gt; y ResultSet como un std::vector&lt;DataRow&gt;. Esta decisión evita la creación de clases polimórficas pesadas para representar filas, garantizando un bajo consumo de memoria RAM al mapear la clave (nombre de la columna) directamente con su valor textual.</text:span></text:p>
        </text:list-item>
        <text:list-item>
          <text:p text:style-name="P9"><text:span text:style-name="T3">Firmas de Métodos y noexcept</text:span><text:span text:style-name="T2">: Las funciones connect, disconnect, execute y query están estrictamente marcadas con noexcept. Esto asegura que ninguna excepción generada por el motor de base de datos cruce la frontera del ABI.</text:span></text:p>
        </text:list-item>
        <text:list-item>
          <text:p text:style-name="P9"><text:span text:style-name="T3">Gestión de Memoria en Lecturas (query)</text:span><text:span text:style-name="T2">: El método query no retorna el ResultSet por valor, sino que lo recibe como un parámetro de salida por referencia (ResultSet&amp; out_result). Esto evita copias innecesarias en la pila y mantiene la compatibilidad de la firma con el contrato noexcept.</text:span></text:p>
        </text:list-item>
      </text:list>
      <text:p text:style-name="P8"/>
      <text:p text:style-name="P15"><text:span text:style-name="T5">2. Implementación Concreta: sqlite_component.cpp</text:span></text:p>
      <text:p text:style-name="P6"><text:span text:style-name="T2">Esta clase materializa el contrato utilizando la C-API nativa de SQLite3, integrando mitigaciones críticas de seguridad y concurrencia.</text:span></text:p>
      <text:p text:style-name="P16"><text:span text:style-name="T2">Ciclo de Vida y Mitigación de Concurrencia</text:span></text:p>
      <text:list xml:id="list1521018647" text:style-name="WWNum2">
        <text:list-item>
          <text:p text:style-name="P10"><text:span text:style-name="T3">sqlite3_open(connection_string.c_str(), &amp;db_)</text:span><text:span text:style-name="T2">: Inicializa la conexión instanciando el motor embebido directamente sobre el archivo local, sin requerir demonios de red.</text:span></text:p>
        </text:list-item>
        <text:list-item>
          <text:p text:style-name="P10"><text:span text:style-name="T3">sqlite3_busy_timeout(db_, 5000)</text:span><text:span text:style-name="T2">: Soluciona el problema intrínseco de concurrencia de SQLite. Instruye al motor para que, si un hilo encuentra la base de datos bloqueada por una escritura, el hilo espere pasivamente en el kernel hasta 5000 milisegundos en lugar de abortar la transacción inmediatamente con un error SQLITE_BUSY.</text:span></text:p>
        </text:list-item>
        <text:list-item>
          <text:p text:style-name="P10"><text:span text:style-name="T3">PRAGMA journal_mode=WAL;</text:span><text:span text:style-name="T2">: Es una optimización arquitectónica vital. Cambia el modo de registro tradicional a </text:span><text:span text:style-name="T4">Write-Ahead Logging</text:span><text:span text:style-name="T2"> (WAL). Esto permite que las lecturas y escrituras ocurran de forma simultánea (lecturas no bloqueantes), escalando radicalmente el rendimiento en entornos multihilo.</text:span></text:p>
        </text:list-item>
      </text:list>
      <text:p text:style-name="P8"/>
      <text:p text:style-name="P16"><text:span text:style-name="T6">Prevención de Inyección SQL y Gestión de Parámetros</text:span></text:p>
      <text:list xml:id="list3381080794" text:style-name="WWNum3">
        <text:list-item>
          <text:p text:style-name="P11"><text:span text:style-name="T3">prepare_and_bind (Método Privado)</text:span><text:span text:style-name="T2">: Centraliza la compilación de sentencias SQL. * </text:span><text:span text:style-name="T3">sqlite3_prepare_v2</text:span><text:span text:style-name="T2">: Compila la consulta SQL cruda (query.c_str()) en un objeto de código de bytes nativo de SQLite (sqlite3_stmt). Esto separa estructuralmente el código lógico de los datos ingresados por el usuario.</text:span></text:p>
        </text:list-item>
        <text:list-item>
          <text:p text:style-name="P11"><text:span text:style-name="T3">SQLITE_TRANSIENT</text:span><text:span text:style-name="T2">: Durante el bucle de enlace (sqlite3_bind_text), se pasa la bandera SQLITE_TRANSIENT. Esto le indica explícitamente a SQLite que no puede confiar en el ciclo de vida del puntero C++ original (params[i].c_str()), obligando al motor de la base de datos a realizar su propia copia privada del texto en memoria antes de que la variable C++ se destruya.</text:span></text:p>
        </text:list-item>
      </text:list>
      <text:p text:style-name="P8"/>
      <text:p text:style-name="P16"><text:span text:style-name="T6">Ejecución y Extracción de Datos</text:span></text:p>
      <text:list xml:id="list4292707757" text:style-name="WWNum4">
        <text:list-item>
          <text:p text:style-name="P12"><text:span text:style-name="T3">Transacciones de Modificación (execute)</text:span><text:span text:style-name="T2">: Invoca sqlite3_step(stmt) y valida que el retorno sea estrictamente SQLITE_DONE, lo que confirma que la inserción, actualización o borrado finalizó sin interrupciones.</text:span></text:p>
        </text:list-item>
        <text:list-item>
          <text:p text:style-name="P12"><text:span text:style-name="T3">Transacciones de Lectura (query)</text:span><text:span text:style-name="T2">:</text:span></text:p>
        </text:list-item>
      </text:list>
      <text:list xml:id="list1528651484" text:style-name="WWNum5">
        <text:list-item>
          <text:list>
            <text:list-item>
              <text:p text:style-name="P14"><text:span text:style-name="T2">Invoca out_result.clear() para purgar cualquier dato residual en el vector de salida.</text:span></text:p>
            </text:list-item>
            <text:list-item>
              <text:p text:style-name="P14"><text:span text:style-name="T2">Utiliza un bucle while (sqlite3_step(stmt) == SQLITE_ROW) para iterar fila por fila de forma eficiente.</text:span></text:p>
            </text:list-item>
            <text:list-item>
              <text:p text:style-name="P14"><text:soft-page-break/><text:span text:style-name="T2">Por cada columna detectada mediante sqlite3_column_count, extrae el nombre (sqlite3_column_name) y el valor (sqlite3_column_text), insertándolos en el mapa DataRow.</text:span></text:p>
            </text:list-item>
            <text:list-item>
              <text:p text:style-name="P14"><text:span text:style-name="T2">Se previene la desreferenciación de punteros nulos en campos vacíos de la base de datos utilizando el operador ternario col_value ? col_value : "null".</text:span></text:p>
            </text:list-item>
          </text:list>
        </text:list-item>
      </text:list>
      <text:list xml:id="list40637481096862" text:continue-list="list4292707757" text:style-name="WWNum4">
        <text:list-item>
          <text:p text:style-name="P12"><text:span text:style-name="T3">sqlite3_finalize(stmt)</text:span><text:span text:style-name="T2">: En todos los casos, el objeto compilado se destruye para evitar fugas de memoria nativa.</text:span></text:p>
        </text:list-item>
      </text:list>
      <text:p text:style-name="P8"/>
      <text:p text:style-name="P15"><text:span text:style-name="T5">3. Exportación de la Interfaz Binaria (C-API)</text:span></text:p>
      <text:p text:style-name="P6"><text:span text:style-name="T2">El bloque final del archivo asegura que el componente pueda ser cargado dinámicamente por la infraestructura del Host.</text:span></text:p>
      <text:list xml:id="list3749025640" text:style-name="WWNum6">
        <text:list-item>
          <text:p text:style-name="P13"><text:span text:style-name="T3">extern "C"</text:span><text:span text:style-name="T2">: Desactiva el </text:span><text:span text:style-name="T4">name mangling</text:span><text:span text:style-name="T2"> del compilador de C++, garantizando que los símbolos binarios (como create_component) mantengan un nombre predecible y estandarizado para ser enlazados mediante dlsym().</text:span></text:p>
        </text:list-item>
        <text:list-item>
          <text:p text:style-name="P13"><text:span text:style-name="T2">El bloque de instanciación captura cualquier error grave de reserva de memoria (try { return new SqliteComponent(); } catch (...)) para evitar caídas catastróficas, devolviendo un puntero seguro que el ModuleManager evaluar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style:font-name="Consolas" fo:font-family="Consolas" style:font-family-generic="roman" style:font-pitch="variable"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style:font-name="Consolas" fo:font-family="Consolas" style:font-family-generic="roman" style:font-pitch="variable"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444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444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29in" fo:margin-bottom="0.3929in" fo:margin-left="0.3929in" fo:margin-right="0.3929in" style:writing-mode="lr-tb" style:layout-grid-color="#c0c0c0" style:layout-grid-lines="259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8" meta:word-count="757" meta:character-count="5435" meta:non-whitespace-character-count="4715"/>
    <meta:generator>LibreOfficeDev/6.0.5.2$Linux_X86_64 LibreOffice_project/</meta:generator>
  </office:meta>
</office:document-meta>
</file>