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Roboto Mono1" svg:font-family="'Roboto Mono'"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margin-top="0in" fo:margin-bottom="0in" loext:contextual-spacing="false" fo:line-height="150%" fo:text-align="center" style:justify-single-word="false"/>
    </style:style>
    <style:style style:name="P3" style:family="paragraph" style:parent-style-name="Standard" style:master-page-name="Standard">
      <style:paragraph-properties fo:margin-top="0in" fo:margin-bottom="0in" loext:contextual-spacing="false" fo:line-height="150%" fo:text-align="center" style:justify-single-word="false" style:page-number="1"/>
    </style:style>
    <style:style style:name="P4" style:family="paragraph" style:parent-style-name="Standard">
      <style:paragraph-properties fo:margin-top="0.0417in" fo:margin-bottom="0in" loext:contextual-spacing="false" fo:line-height="100%">
        <style:tab-stops>
          <style:tab-stop style:position="8.3335in" style:type="right" style:leader-style="dotted" style:leader-text="."/>
        </style:tab-stops>
      </style:paragraph-properties>
    </style:style>
    <style:style style:name="P5" style:family="paragraph" style:parent-style-name="Standard">
      <style:paragraph-properties fo:margin-left="0.25in" fo:margin-right="0in" fo:margin-top="0.0417in" fo:margin-bottom="0in" loext:contextual-spacing="false" fo:line-height="100%" fo:text-indent="0in" style:auto-text-indent="false">
        <style:tab-stops>
          <style:tab-stop style:position="8.3335in" style:type="right" style:leader-style="dotted" style:leader-text="."/>
        </style:tab-stops>
      </style:paragraph-properties>
    </style:style>
    <style:style style:name="P6" style:family="paragraph" style:parent-style-name="Standard">
      <style:paragraph-properties fo:margin-left="0.5in" fo:margin-right="0in" fo:margin-top="0.0417in" fo:margin-bottom="0in" loext:contextual-spacing="false" fo:line-height="100%" fo:text-indent="0in" style:auto-text-indent="false">
        <style:tab-stops>
          <style:tab-stop style:position="8.3335in" style:type="right" style:leader-style="dotted" style:leader-text="."/>
        </style:tab-stops>
      </style:paragraph-properties>
    </style:style>
    <style:style style:name="P7" style:family="paragraph" style:parent-style-name="Standard">
      <style:paragraph-properties fo:margin-left="0.5in" fo:margin-right="0in" fo:line-height="150%" fo:text-align="justify" style:justify-single-word="false" fo:text-indent="0in" style:auto-text-indent="false"/>
    </style:style>
    <style:style style:name="P8" style:family="paragraph" style:parent-style-name="Standard">
      <style:paragraph-properties fo:line-height="150%" fo:text-align="justify" style:justify-single-word="false" fo:padding="0in" fo:border="none"/>
    </style:style>
    <style:style style:name="P9" style:family="paragraph" style:parent-style-name="Standard">
      <style:paragraph-properties fo:line-height="150%" fo:text-align="justify" style:justify-single-word="false" fo:padding="0in" fo:border="none"/>
      <style:text-properties fo:color="#1f1f1f"/>
    </style:style>
    <style:style style:name="P10" style:family="paragraph" style:parent-style-name="Standard" style:list-style-name="WWNum1">
      <style:paragraph-properties fo:margin-left="0.4098in" fo:margin-right="0in" fo:line-height="150%" fo:text-align="justify" style:justify-single-word="false" fo:text-indent="-0.25in" style:auto-text-indent="false" fo:padding="0in" fo:border="none"/>
    </style:style>
    <style:style style:name="P11" style:family="paragraph" style:parent-style-name="Standard" style:list-style-name="WWNum2">
      <style:paragraph-properties fo:margin-left="0.4098in" fo:margin-right="0in" fo:line-height="150%" fo:text-align="justify" style:justify-single-word="false" fo:text-indent="-0.25in" style:auto-text-indent="false" fo:padding="0in" fo:border="none"/>
    </style:style>
    <style:style style:name="P12" style:family="paragraph" style:parent-style-name="Standard" style:list-style-name="WWNum3">
      <style:paragraph-properties fo:margin-left="0.4098in" fo:margin-right="0in" fo:line-height="150%" fo:text-align="justify" style:justify-single-word="false" fo:text-indent="-0.25in" style:auto-text-indent="false" fo:padding="0in" fo:border="none"/>
    </style:style>
    <style:style style:name="P13" style:family="paragraph" style:parent-style-name="Standard" style:list-style-name="WWNum4">
      <style:paragraph-properties fo:margin-left="0.4098in" fo:margin-right="0in" fo:line-height="150%" fo:text-align="justify" style:justify-single-word="false" fo:text-indent="-0.25in" style:auto-text-indent="false" fo:padding="0in" fo:border="none"/>
    </style:style>
    <style:style style:name="P14" style:family="paragraph" style:parent-style-name="Standard" style:list-style-name="WWNum5">
      <style:paragraph-properties fo:margin-left="0.4098in" fo:margin-right="0in" fo:line-height="150%" fo:text-align="justify" style:justify-single-word="false" fo:text-indent="-0.25in" style:auto-text-indent="false" fo:padding="0in" fo:border="none"/>
    </style:style>
    <style:style style:name="P15" style:family="paragraph" style:parent-style-name="Standard">
      <style:paragraph-properties fo:margin-left="0in" fo:margin-right="0in" fo:line-height="150%" fo:text-align="justify" style:justify-single-word="false" fo:text-indent="0.5in" style:auto-text-indent="false"/>
    </style:style>
    <style:style style:name="P16" style:family="paragraph" style:parent-style-name="Standard">
      <style:paragraph-properties fo:margin-left="0in" fo:margin-right="0in" fo:line-height="150%" fo:text-align="center" style:justify-single-word="false" fo:text-indent="0.5in" style:auto-text-indent="false"/>
    </style:style>
    <style:style style:name="P17" style:family="paragraph" style:parent-style-name="Standard">
      <style:paragraph-properties fo:margin-left="0.5in" fo:margin-right="0in" fo:line-height="150%" fo:text-align="justify" style:justify-single-word="false" fo:text-indent="0.5in" style:auto-text-indent="false"/>
    </style:style>
    <style:style style:name="P18" style:family="paragraph" style:parent-style-name="Standard">
      <style:paragraph-properties fo:margin-left="0.5in" fo:margin-right="0in" fo:line-height="150%" fo:text-align="justify" style:justify-single-word="false" fo:text-indent="0.5in" style:auto-text-indent="false"/>
      <style:text-properties fo:font-weight="bold" style:font-weight-asian="bold" style:font-weight-complex="bold"/>
    </style:style>
    <style:style style:name="P19" style:family="paragraph" style:parent-style-name="Standard">
      <style:paragraph-properties fo:margin-left="1in" fo:margin-right="0in" fo:line-height="150%" fo:text-align="justify" style:justify-single-word="false" fo:text-indent="0.5in" style:auto-text-indent="false"/>
    </style:style>
    <style:style style:name="P20" style:family="paragraph" style:parent-style-name="Standard">
      <style:paragraph-properties fo:margin-left="0in" fo:margin-right="0in" fo:line-height="150%" fo:text-align="justify" style:justify-single-word="false" fo:text-indent="0.5in" style:auto-text-indent="false"/>
    </style:style>
    <style:style style:name="P21" style:family="paragraph" style:parent-style-name="Standard">
      <style:paragraph-properties fo:margin-left="0in" fo:margin-right="0in" fo:line-height="150%" fo:text-align="justify" style:justify-single-word="false" fo:text-indent="0in" style:auto-text-indent="false"/>
      <style:text-properties fo:font-weight="bold" style:font-weight-asian="bold" style:font-weight-complex="bold"/>
    </style:style>
    <style:style style:name="P22" style:family="paragraph" style:parent-style-name="Standard">
      <style:paragraph-properties fo:margin-left="0in" fo:margin-right="0in" fo:line-height="150%" fo:text-align="justify" style:justify-single-word="false" fo:text-indent="0in" style:auto-text-indent="false"/>
    </style:style>
    <style:style style:name="P23" style:family="paragraph" style:parent-style-name="Standard" style:list-style-name="WWNum6">
      <style:paragraph-properties fo:margin-left="0.4165in" fo:margin-right="0in" fo:line-height="150%" fo:text-align="justify" style:justify-single-word="false" fo:text-indent="-0.25in" style:auto-text-indent="false" fo:padding="0in" fo:border="none"/>
    </style:style>
    <style:style style:name="P24" style:family="paragraph" style:parent-style-name="Heading_20_1">
      <style:paragraph-properties fo:margin-top="0in" fo:margin-bottom="0in" loext:contextual-spacing="false" fo:line-height="150%" fo:text-align="center" style:justify-single-word="false" fo:break-before="page"/>
    </style:style>
    <style:style style:name="P25" style:family="paragraph" style:parent-style-name="Heading_20_3">
      <style:paragraph-properties fo:margin-top="0in" fo:margin-bottom="0.1772in" loext:contextual-spacing="false" fo:line-height="150%" fo:text-align="justify" style:justify-single-word="false"/>
    </style:style>
    <style:style style:name="P26" style:family="paragraph" style:parent-style-name="Heading_20_2">
      <style:paragraph-properties fo:margin-top="0in" fo:margin-bottom="0in" loext:contextual-spacing="false" fo:line-height="150%" fo:text-align="start" style:justify-single-word="false" fo:padding="0in" fo:border="none"/>
      <style:text-properties fo:color="#1f1f1f"/>
    </style:style>
    <style:style style:name="P27" style:family="paragraph" style:parent-style-name="Heading_20_2">
      <style:paragraph-properties fo:margin-top="0in" fo:margin-bottom="0.1665in" loext:contextual-spacing="false" fo:line-height="150%" fo:text-align="justify"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4" style:family="text">
      <style:text-properties fo:color="#1f1f1f" style:font-name="Arial" fo:font-weight="bold" style:font-name-asian="Arial2" style:font-weight-asian="bold" style:font-name-complex="Arial2" style:font-weight-complex="bold"/>
    </style:style>
    <style:style style:name="T5" style:family="text">
      <style:text-properties fo:color="#1f1f1f" style:font-name="Arial" style:font-name-asian="Arial2" style:font-name-complex="Arial2"/>
    </style:style>
    <style:style style:name="T6" style:family="text">
      <style:text-properties fo:color="#1f1f1f" style:font-name="Arial" fo:font-style="italic" style:font-name-asian="Arial2" style:font-style-asian="italic" style:font-name-complex="Arial2" style:font-style-complex="italic"/>
    </style:style>
    <style:style style:name="T7" style:family="text">
      <style:text-properties fo:color="#1f1f1f" style:font-name="Arial" fo:font-style="italic" fo:font-weight="bold" style:font-name-asian="Arial2" style:font-style-asian="italic" style:font-weight-asian="bold" style:font-name-complex="Arial2" style:font-style-complex="italic" style:font-weight-complex="bold"/>
    </style:style>
    <style:style style:name="T8" style:family="text">
      <style:text-properties fo:font-style="italic" style:font-style-asian="italic" style:font-style-complex="italic"/>
    </style:style>
    <style:style style:name="T9" style:family="text">
      <style:text-properties style:font-name="Roboto Mono" style:font-name-asian="Roboto Mono1" style:font-name-complex="Roboto Mono1"/>
    </style:style>
    <style:style style:name="T10" style:family="text">
      <style:text-properties style:font-name="Roboto Mono" fo:font-weight="bold" style:font-name-asian="Roboto Mono1" style:font-weight-asian="bold" style:font-name-complex="Roboto Mono1"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cuerdos de Codificación y Nomenclatura en C++</text:span></text:p>
      <text:p text:style-name="P2"><text:span text:style-name="T1">ÍNDICE</text:span></text:p>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text:a xlink:type="simple" xlink:href="#_sp4grt545au7" text:style-name="Index_20_Link" text:visited-style-name="Index_20_Link"><text:span text:style-name="T2">Acuerdos de Codificación y Nomenclatura en C++<text:tab/>2</text:span></text:a></text:p>
          <text:p text:style-name="P5"><text:a xlink:type="simple" xlink:href="#_bbeavb8xplx6" text:style-name="Index_20_Link" text:visited-style-name="Index_20_Link"><text:span text:style-name="T3">1. Convenciones de Nomenclatura (El Estándar Híbrido)<text:tab/>2</text:span></text:a></text:p>
          <text:p text:style-name="P6"><text:a xlink:type="simple" xlink:href="#_qo2mhxbsynbf" text:style-name="Index_20_Link" text:visited-style-name="Index_20_Link"><text:span text:style-name="T3">1.1. Archivos del Sistema (snake_case)<text:tab/>2</text:span></text:a></text:p>
          <text:p text:style-name="P6"><text:a xlink:type="simple" xlink:href="#_td55801w0s50" text:style-name="Index_20_Link" text:visited-style-name="Index_20_Link"><text:span text:style-name="T3">1.2. Clases y Estructuras (PascalCase)<text:tab/>2</text:span></text:a></text:p>
          <text:p text:style-name="P6"><text:a xlink:type="simple" xlink:href="#_2q98nlaphuu0" text:style-name="Index_20_Link" text:visited-style-name="Index_20_Link"><text:span text:style-name="T3">1.3. Funciones y Métodos (snake_case)<text:tab/>3</text:span></text:a></text:p>
          <text:p text:style-name="P6"><text:a xlink:type="simple" xlink:href="#_g7byid2hkjc8" text:style-name="Index_20_Link" text:visited-style-name="Index_20_Link"><text:span text:style-name="T3">1.4. Variables y Atributos de Clase<text:tab/>3</text:span></text:a></text:p>
          <text:p text:style-name="P6"><text:a xlink:type="simple" xlink:href="#_u4ferrd6ybyt" text:style-name="Index_20_Link" text:visited-style-name="Index_20_Link"><text:span text:style-name="T3">1.5. Constantes y Macros (UPPER_SNAKE_CASE)<text:tab/>3</text:span></text:a></text:p>
          <text:p text:style-name="P6"><text:a xlink:type="simple" xlink:href="#_46flm4dtsand" text:style-name="Index_20_Link" text:visited-style-name="Index_20_Link"><text:span text:style-name="T3">1.6. Instancias de Clase<text:tab/>4</text:span></text:a></text:p>
          <text:p text:style-name="P6"><text:a xlink:type="simple" xlink:href="#_i3olvlh81tto" text:style-name="Index_20_Link" text:visited-style-name="Index_20_Link"><text:span text:style-name="T3">1.7. Constructores y destructores<text:tab/>5</text:span></text:a></text:p>
          <text:p text:style-name="P5"><text:a xlink:type="simple" xlink:href="#_jfexs39ji15d" text:style-name="Index_20_Link" text:visited-style-name="Index_20_Link"><text:span text:style-name="T3">2. Principios Arquitectónicos Obligatorios<text:tab/>6</text:span></text:a></text:p>
        </text:index-body>
      </text:table-of-content>
      <text:p text:style-name="P26"/>
      <text:p text:style-name="P24"><text:bookmark text:name="_sp4grt545au7"/>Acuerdos de Codificación y Nomenclatura en C++</text:p>
      <text:p text:style-name="Standard"/>
      <text:p text:style-name="P8"><text:span text:style-name="T4">Objetivo del Documento:</text:span><text:span text:style-name="T5"> Establecer un estándar de escritura de código unificado para el desarrollo de software en C++. Este documento no obedece a preferencias estéticas personales, sino a convenciones de la industria (alineadas con la </text:span><text:span text:style-name="T6">Google C++ Style Guide</text:span><text:span text:style-name="T5"> y la Biblioteca Estándar de C++) y a principios de eficiencia algorítmica. Un código estandarizado es fundamental en el modelo GREENSOFT: reduce la deuda técnica, minimiza las refactorizaciones y evita ciclos de compilación inútiles por errores de portabilidad.</text:span></text:p>
      <text:p text:style-name="P9"/>
      <text:p text:style-name="P27"><text:bookmark text:name="_bbeavb8xplx6"/>1. Convenciones de Nomenclatura (El Estándar Híbrido)</text:p>
      <text:p text:style-name="P8"><text:span text:style-name="T5">El ecosistema C++ no utiliza un único formato (</text:span><text:span text:style-name="T6">camelCase</text:span><text:span text:style-name="T5"> o </text:span><text:span text:style-name="T6">snake_case</text:span><text:span text:style-name="T5">), sino un modelo híbrido donde cada convención tiene un significado semántico estricto.</text:span></text:p>
      <text:p text:style-name="P9"/>
      <text:p text:style-name="P25"><text:bookmark text:name="_qo2mhxbsynbf"/>1.1. Archivos del Sistema (snake_case)</text:p>
      <text:p text:style-name="P8"><text:span text:style-name="T5">Todos los archivos fuente (.cpp) y cabeceras (.hpp / .h) deben escribirse exclusivamente en minúsculas y separados por guiones bajos.</text:span></text:p>
      <text:list xml:id="list487982262" text:style-name="WWNum1">
        <text:list-item>
          <text:p text:style-name="P10"><text:span text:style-name="T4">Correcto:</text:span><text:span text:style-name="T5"> http_server.hpp, procesador_datos.cpp</text:span></text:p>
        </text:list-item>
        <text:list-item>
          <text:p text:style-name="P10"><text:span text:style-name="T4">Incorrecto:</text:span><text:span text:style-name="T5"> HttpServer.hpp, procesadorDatos.cpp</text:span></text:p>
        </text:list-item>
        <text:list-item>
          <text:p text:style-name="P10"><text:span text:style-name="T4">Fundamento Técnico:</text:span><text:span text:style-name="T5"> Los sistemas de archivos de la familia POSIX (como Ext4 en Linux) distinguen entre mayúsculas y minúsculas (</text:span><text:span text:style-name="T6">case-sensitive</text:span><text:span text:style-name="T5">), mientras que NTFS (Windows) no. Incluir un archivo como #include "HttpServer.hpp" cuando el archivo se llama httpserver.hpp compilará en Windows pero provocará un fallo crítico en los servidores de producción Linux. El uso estricto de snake_case garantiza una portabilidad absoluta.</text:span></text:p>
        </text:list-item>
      </text:list>
      <text:p text:style-name="P9"/>
      <text:p text:style-name="P25"><text:bookmark text:name="_td55801w0s50"/>1.2. Clases y Estructuras (PascalCase)</text:p>
      <text:p text:style-name="P8"><text:span text:style-name="T5">Los nombres de tipos definidos por el usuario (clases, structs, enums, typedefs) deben comenzar con mayúscula y usar formato de camello sin guiones bajos.</text:span></text:p>
      <text:list xml:id="list1939283625" text:style-name="WWNum2">
        <text:list-item>
          <text:p text:style-name="P11"><text:span text:style-name="T4">Correcto:</text:span><text:span text:style-name="T5"> class HttpServer, struct HttpRequest</text:span></text:p>
        </text:list-item>
        <text:list-item>
          <text:p text:style-name="P11"><text:span text:style-name="T4">Incorrecto:</text:span><text:span text:style-name="T5"> class http_server, struct HTTPRequest</text:span></text:p>
        </text:list-item>
        <text:list-item>
          <text:p text:style-name="P11"><text:span text:style-name="T4">Fundamento Técnico:</text:span><text:span text:style-name="T5"> Permite distinguir visualmente e instantáneamente los tipos de datos creados por el desarrollador de los tipos de datos primitivos del lenguaje (int, char, float), los cuales siempre van en minúscula.</text:span></text:p>
        </text:list-item>
      </text:list>
      <text:p text:style-name="P9"/>
      <text:p text:style-name="P25"><text:bookmark text:name="_2q98nlaphuu0"/>1.3. Funciones y Métodos (snake_case)</text:p>
      <text:p text:style-name="P8"><text:span text:style-name="T5">Toda función, método de clase o expresión lambda debe escribirse en minúsculas y separar las palabras con guiones bajos.</text:span></text:p>
      <text:list xml:id="list2453377789" text:style-name="WWNum3">
        <text:list-item>
          <text:p text:style-name="P12"><text:soft-page-break/><text:span text:style-name="T4">Correcto:</text:span><text:span text:style-name="T5"> parse_query_string(), listen_and_serve()</text:span></text:p>
        </text:list-item>
        <text:list-item>
          <text:p text:style-name="P12"><text:span text:style-name="T4">Incorrecto:</text:span><text:span text:style-name="T5"> parseQueryString(), ListenAndServe()</text:span></text:p>
        </text:list-item>
        <text:list-item>
          <text:p text:style-name="P12"><text:span text:style-name="T4">Fundamento Técnico:</text:span><text:span text:style-name="T5"> Preserva la coherencia léxica con la Biblioteca Estándar de C++ (STL). Al interactuar con métodos nativos como std::string::find() o std::vector::push_back(), el uso de snake_case evita un código fragmentado donde conviven múltiples paradigmas visuales de forma caótica.</text:span></text:p>
        </text:list-item>
      </text:list>
      <text:p text:style-name="P9"/>
      <text:p text:style-name="P25"><text:bookmark text:name="_g7byid2hkjc8"/>1.4. Variables y Atributos de Clase</text:p>
      <text:p text:style-name="P8"><text:span text:style-name="T5">Las variables locales y los parámetros de las funciones utilizan snake_case. Sin embargo, los atributos (variables miembro) privados de una clase deben llevar un sufijo de guion bajo (_).</text:span></text:p>
      <text:list xml:id="list4182856249" text:style-name="WWNum4">
        <text:list-item>
          <text:p text:style-name="P13"><text:span text:style-name="T4">Variables locales (Correcto):</text:span><text:span text:style-name="T5"> client_socket, bytes_read</text:span></text:p>
        </text:list-item>
        <text:list-item>
          <text:p text:style-name="P13"><text:span text:style-name="T4">Atributos privados (Correcto):</text:span><text:span text:style-name="T5"> port_, routes_, console_mutex_</text:span></text:p>
        </text:list-item>
        <text:list-item>
          <text:p text:style-name="P13"><text:span text:style-name="T4">Fundamento Técnico:</text:span><text:span text:style-name="T5"> Elimina la ambigüedad en la capa de abstracción. El desarrollador sabe inmediatamente si está modificando el estado interno de un objeto (afectando la memoria de la instancia) o si solo está manipulando una variable temporal en el </text:span><text:span text:style-name="T6">stack</text:span><text:span text:style-name="T5">. Esto evita colisiones de nombres y reduce la necesidad de usar el puntero this-&gt; explícitamente.</text:span></text:p>
        </text:list-item>
      </text:list>
      <text:p text:style-name="P9"/>
      <text:p text:style-name="P25"><text:bookmark text:name="_u4ferrd6ybyt"/>1.5. Constantes y Macros (UPPER_SNAKE_CASE)</text:p>
      <text:p text:style-name="P8"><text:span text:style-name="T5">Los valores inmutables definidos mediante constexpr, const estáticos, o macros del preprocesador deben escribirse íntegramente en mayúsculas.</text:span></text:p>
      <text:list xml:id="list710438813" text:style-name="WWNum5">
        <text:list-item>
          <text:p text:style-name="P14"><text:span text:style-name="T4">Correcto:</text:span><text:span text:style-name="T5"> const int MAX_BUFFER_SIZE = 2048;</text:span></text:p>
        </text:list-item>
        <text:list-item>
          <text:p text:style-name="P14"><text:span text:style-name="T4">Incorrecto:</text:span><text:span text:style-name="T5"> const int maxBufferSize = 2048;</text:span></text:p>
        </text:list-item>
      </text:list>
      <text:p text:style-name="P25"><text:bookmark text:name="_46flm4dtsand"/>1.6. Instancias de Clase</text:p>
      <text:p text:style-name="P15">En C++, una instancia de clase (un objeto) no es más que una variable cuyo tipo ha sido definido por el usuario. Las convenciones de la industria no hacen distinción visual entre una variable de tipo primitivo (int, float) y un objeto complejo (HttpRequest, HttpServer). Por lo tanto, las instancias heredan exactamente las mismas reglas que definimos para las variables en el documento, variando únicamente según su alcance (<text:span text:style-name="T8">scope</text:span>) y mutabilidad:</text:p>
      <text:p text:style-name="P15">El fundamento técnico es que, en C++, tratar a los objetos de forma visualmente distinta a las variables primitivas genera una carga cognitiva innecesaria al leer el código. Al ver <text:span text:style-name="T9">cliente_actual</text:span>, el desarrollador o revisor sabe inmediatamente que es una variable local en memoria transitoria, sin importar si internamente es un simple <text:span text:style-name="T9">int</text:span> (un descriptor de socket primitivo) o una instancia compleja de una clase <text:span text:style-name="T9">SocketRAII</text:span>. La convención describe <text:span text:style-name="T1">qué rol cumple la variable</text:span>, no qué tan compleja es su estructura interna.</text:p>
      <text:p text:style-name="P15"/>
      <text:p text:style-name="P16">Ejemplos:</text:p>
      <text:p text:style-name="P15">Instancias como variables locales (<text:span text:style-name="T10">snake_case</text:span>):</text:p>
      <text:p text:style-name="P15">// Correcto: </text:p>
      <text:p text:style-name="P15"><text:soft-page-break/><text:span text:style-name="T1">HttpServer servidor_local(8080); </text:span></text:p>
      <text:p text:style-name="P15"><text:span text:style-name="T1">HttpRequest peticion_entrante; </text:span></text:p>
      <text:p text:style-name="P15"/>
      <text:p text:style-name="P15">// Incorrecto: </text:p>
      <text:p text:style-name="P15"><text:span text:style-name="T1">HttpServer ServidorLocal(8080); </text:span></text:p>
      <text:p text:style-name="P15"><text:span text:style-name="T1">HttpRequest peticionEntrante;</text:span></text:p>
      <text:p text:style-name="P15"/>
      <text:p text:style-name="P15">Instancias como atributos de otra clase <text:span text:style-name="T9">(</text:span><text:span text:style-name="T10">snake_case_</text:span>):</text:p>
      <text:p text:style-name="P15"><text:span text:style-name="T1">class GestorRed </text:span></text:p>
      <text:p text:style-name="P15"><text:span text:style-name="T1">{ </text:span></text:p>
      <text:p text:style-name="P17"><text:span text:style-name="T1">private: </text:span></text:p>
      <text:p text:style-name="P17"><text:span text:style-name="T1">// Correcto: son instancias de clase, pero al ser atributos privados llevan el sufijo. </text:span></text:p>
      <text:p text:style-name="P19"><text:span text:style-name="T1">HttpServer servidor_principal_;</text:span></text:p>
      <text:p text:style-name="P17"><text:span text:style-name="T1"><text:s/><text:tab/>std::vector&lt;HttpRequest&gt; historial_peticiones_; </text:span></text:p>
      <text:p text:style-name="P7"><text:span text:style-name="T1">};</text:span></text:p>
      <text:p text:style-name="P7">Instancias constantes o globales (<text:span text:style-name="T10">UPPER_SNAKE_CASE</text:span>):</text:p>
      <text:p text:style-name="P17"><text:span text:style-name="T1">const HttpResponse RESPUESTA_ERROR_DEFECTO;</text:span></text:p>
      <text:p text:style-name="P18"/>
      <text:p text:style-name="P25"><text:bookmark text:name="_i3olvlh81tto"/>1.7. Constructores y destructores</text:p>
      <text:p text:style-name="P15">Por último es importante aclarar que los constructores y destructores utilizan PascalCase única y exclusivamente porque el compilador de C++ exige que sus identificadores sean una copia exacta del nombre de la clase. Esto no obedece a una regla de convención de estilo independiente, sino a una obligación estricta del lenguaje C++ (establecida en el estándar ISO/IEC 14882).</text:p>
      <text:p text:style-name="P15">La regla dicta que el constructor debe tener exactamente el mismo identificador léxico que la clase, y el destructor igual, precedido por una tilde (~). Como nuestra guía de estilo establece que las clases se definen en PascalCase, los constructores y destructores heredan esta capitalización de forma colateral e ineludible.</text:p>
      <text:p text:style-name="P21"><text:soft-page-break/></text:p>
      <text:p text:style-name="P1"><text:span text:style-name="T1">class HttpServer</text:span></text:p>
      <text:p text:style-name="P1"><text:span text:style-name="T1"><text:s/>{</text:span></text:p>
      <text:p text:style-name="P22"><text:span text:style-name="T1"><text:s text:c="7"/>public:</text:span></text:p>
      <text:p text:style-name="P7"><text:span text:style-name="T1">// Correcto: Obligatoriamente en PascalCase porque la clase se llama HttpServer.</text:span></text:p>
      <text:p text:style-name="P22"><text:span text:style-name="T1"><text:s text:c="11"/>// Quien exige esta coincidencia es el COMPILADOR, no el preprocesador.</text:span></text:p>
      <text:p text:style-name="P7"><text:span text:style-name="T1"><text:s text:c="4"/>HttpServer(int port); </text:span></text:p>
      <text:p text:style-name="P7"><text:span text:style-name="T1"><text:s text:c="4"/>~HttpServer();</text:span></text:p>
      <text:p text:style-name="P7"><text:span text:style-name="T1"><text:s text:c="4"/></text:span></text:p>
      <text:p text:style-name="P7"><text:span text:style-name="T1"><text:s/>// Incorrecto: El compilador lo evaluará como la declaración de un método regular </text:span></text:p>
      <text:p text:style-name="P7"><text:span text:style-name="T1"><text:s/>// y arrojará error (ISO C++ forbid declaration of 'http_server' with no type).</text:span></text:p>
      <text:p text:style-name="P7"><text:span text:style-name="T1"><text:s/>// http_server(int port); </text:span></text:p>
      <text:p text:style-name="P1"><text:span text:style-name="T1">};</text:span></text:p>
      <text:p text:style-name="P21"/>
      <text:p text:style-name="P9"/>
      <text:p text:style-name="P9"/>
      <text:p text:style-name="P9"/>
      <text:p text:style-name="P9"/>
      <text:p text:style-name="Heading_20_2"><text:bookmark text:name="_jfexs39ji15d"/>2. Principios Arquitectónicos Obligatorios</text:p>
      <text:list xml:id="list3536660029" text:style-name="WWNum6">
        <text:list-item>
          <text:p text:style-name="P23"><text:span text:style-name="T4">Gestión de Memoria (RAII - </text:span><text:span text:style-name="T7">Resource Acquisition Is Initialization</text:span><text:span text:style-name="T4">):</text:span><text:span text:style-name="T5"> Queda estrictamente prohibido el uso de punteros desnudos (new / delete) o el manejo manual de descriptores de archivos sin encapsulación. Todo recurso de hardware (sockets, archivos, mutex) debe estar atado al ciclo de vida de un objeto. Si un objeto se destruye al salir de su ámbito, su destructor debe liberar el recurso automáticamente.</text:span></text:p>
        </text:list-item>
        <text:list-item>
          <text:p text:style-name="P23"><text:span text:style-name="T4">Principio de Responsabilidad Única (SRP):</text:span><text:span text:style-name="T5"> Un método, una función o un archivo debe resolver un solo problema de negocio. La lógica de red (sockets), la lógica de protocolo (HTTP) y la lógica de aplicación (rutas de la API) deben residir en capas distintas e incomunicadas directamente.</text:span></text:p>
        </text:list-item>
        <text:list-item>
          <text:p text:style-name="P23"><text:soft-page-break/><text:span text:style-name="T4">Inmutabilidad por Defecto:</text:span><text:span text:style-name="T5"> Si un parámetro o una variable no requiere ser modificada después de su inicialización, debe ser declarada como const. Si se pasa un objeto complejo a una función (como HttpRequest), debe pasarse como referencia constante (const HttpRequest&amp;) para evitar la clonación innecesaria de datos en la memoria RAM, optimizando el consumo energético del hardwa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50%" fo:text-align="center" style:justify-single-word="false"/>
      <style:text-properties fo:color="#1f1f1f" fo:font-size="18pt" fo:font-weight="bold" style:font-size-asian="18pt" style:font-weight-asian="bold" style:font-size-complex="18pt" style:font-weight-complex="bold"/>
    </style:style>
    <style:style style:name="Heading_20_2" style:display-name="Heading 2" style:family="paragraph" style:parent-style-name="normal" style:next-style-name="Standard" style:default-outline-level="" style:class="text">
      <style:paragraph-properties fo:margin-top="0in" fo:margin-bottom="0.1665in" loext:contextual-spacing="false" fo:line-height="150%" fo:text-align="justify" style:justify-single-word="false"/>
      <style:text-properties fo:color="#1f1f1f" fo:font-size="14pt" fo:font-weight="bold" style:font-size-asian="14pt" style:font-weight-asian="bold" style:font-size-complex="14pt" style:font-weight-complex="bold"/>
    </style:style>
    <style:style style:name="Heading_20_3" style:display-name="Heading 3" style:family="paragraph" style:parent-style-name="normal" style:next-style-name="Standard" style:default-outline-level="" style:class="text">
      <style:paragraph-properties fo:margin-top="0in" fo:margin-bottom="0.1772in" loext:contextual-spacing="false" fo:line-height="150%" fo:text-align="justify" style:justify-single-word="false"/>
      <style:text-properties fo:color="#1f1f1f" fo:font-size="12pt" fo:font-weight="bold" style:font-size-asian="12pt" style:font-weight-asian="bold" style:font-size-complex="12pt"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409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0" meta:word-count="1121" meta:character-count="7796" meta:non-whitespace-character-count="6722"/>
    <meta:generator>LibreOfficeDev/6.0.5.2$Linux_X86_64 LibreOffice_project/</meta:generator>
  </office:meta>
</office:document-meta>
</file>