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10A16E94A849BCC8DA6.png" manifest:media-type="image/png"/>
  <manifest:file-entry manifest:full-path="Pictures/1000000000000270000001226712306F2B8058AC.png" manifest:media-type="image/png"/>
  <manifest:file-entry manifest:full-path="Pictures/10000000000003730000028CD6B9915F45D43D5F.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style:font-name="Courier New" fo:font-size="12pt" style:font-name-asian="Courier New1" style:font-size-asian="12pt" style:font-name-complex="Courier New1" style:font-size-complex="12pt"/>
    </style:style>
    <style:style style:name="P2" style:family="paragraph" style:parent-style-name="Standard">
      <style:paragraph-properties fo:line-height="150%" fo:text-align="justify" style:justify-single-word="false"/>
      <style:text-properties style:font-name="Courier New" fo:font-size="12pt" style:font-name-asian="Courier New1" style:font-size-asian="12pt" style:font-name-complex="Courier New1" style:font-size-complex="12pt"/>
    </style:style>
    <style:style style:name="P3" style:family="paragraph" style:parent-style-name="Standard">
      <style:paragraph-properties fo:line-height="150%" fo:text-align="center" style:justify-single-word="false"/>
      <style:text-properties style:font-name="Courier New" fo:font-size="12pt" fo:font-weight="bold" style:font-name-asian="Courier New1" style:font-size-asian="12pt" style:font-weight-asian="bold" style:font-name-complex="Courier New1" style:font-size-complex="12pt" style:font-weight-complex="bold"/>
    </style:style>
    <style:style style:name="P4" style:family="paragraph" style:parent-style-name="Standard">
      <style:text-properties style:font-name="Courier New"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P5" style:family="paragraph" style:parent-style-name="Standard">
      <style:paragraph-properties fo:text-align="justify" style:justify-single-word="false"/>
      <style:text-properties style:font-name="Courier New"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P6" style:family="paragraph" style:parent-style-name="Standard">
      <style:paragraph-properties fo:text-align="justify" style:justify-single-word="false"/>
      <style:text-properties style:font-name="Courier New" fo:font-size="12pt" fo:font-style="italic" style:font-name-asian="Courier New1" style:font-size-asian="12pt" style:font-style-asian="italic" style:font-name-complex="Courier New1" style:font-size-complex="12pt"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fo:font-size="12pt" style:font-size-asian="12pt" style:font-size-complex="12pt"/>
    </style:style>
    <style:style style:name="P9"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paragraph-properties fo:text-align="justify" style:justify-single-word="false"/>
    </style:style>
    <style:style style:name="P13" style:family="paragraph" style:parent-style-name="Standard">
      <style:paragraph-properties fo:text-align="end" style:justify-single-word="false"/>
    </style:style>
    <style:style style:name="P14" style:family="paragraph" style:parent-style-name="Standard">
      <style:paragraph-properties fo:margin-top="0.1945in" fo:margin-bottom="0in" loext:contextual-spacing="false" fo:line-height="150%" fo:text-align="center" style:justify-single-word="false" fo:keep-together="auto" fo:keep-with-next="auto"/>
    </style:style>
    <style:style style:name="P15" style:family="paragraph" style:parent-style-name="Standard">
      <style:paragraph-properties fo:margin-top="0.1945in" fo:margin-bottom="0in" loext:contextual-spacing="false" fo:line-height="150%" fo:text-align="center" style:justify-single-word="false" fo:keep-together="auto" fo:keep-with-next="auto"/>
      <style:text-properties style:font-name="Courier New" fo:font-size="17pt" style:font-name-asian="Courier New1" style:font-size-asian="17pt" style:font-name-complex="Courier New1" style:font-size-complex="17pt"/>
    </style:style>
    <style:style style:name="P16" style:family="paragraph" style:parent-style-name="Standard" style:master-page-name="First_20_Page">
      <style:paragraph-properties fo:margin-top="0.1945in" fo:margin-bottom="0in" loext:contextual-spacing="false" fo:line-height="150%" fo:text-align="center" style:justify-single-word="false" fo:keep-together="auto" style:page-number="auto" fo:keep-with-next="auto"/>
    </style:style>
    <style:style style:name="P1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1" style:family="paragraph" style:parent-style-name="Standard">
      <style:paragraph-properties fo:margin-left="0.5in" fo:margin-right="0in" fo:margin-top="0.1665in" fo:margin-bottom="0.1665in" loext:contextual-spacing="false" fo:line-height="150%" fo:text-align="justify" style:justify-single-word="false" fo:text-indent="0in" style:auto-text-indent="false"/>
    </style:style>
    <style:style style:name="P22" style:family="paragraph" style:parent-style-name="Standard">
      <style:paragraph-properties fo:margin-left="0in" fo:margin-right="0in" fo:line-height="150%" fo:text-align="justify" style:justify-single-word="false" fo:text-indent="0.5in" style:auto-text-indent="false"/>
      <style:text-properties style:font-name="Courier New" fo:font-size="12pt" style:font-name-asian="Courier New1" style:font-size-asian="12pt" style:font-name-complex="Courier New1" style:font-size-complex="12pt"/>
    </style:style>
    <style:style style:name="P23" style:family="paragraph" style:parent-style-name="Standard">
      <style:paragraph-properties fo:margin-left="0in" fo:margin-right="0in" fo:line-height="150%" fo:text-indent="0.5in" style:auto-text-indent="false"/>
      <style:text-properties style:font-name="Courier New" style:font-name-asian="Courier New1" style:font-name-complex="Courier New1"/>
    </style:style>
    <style:style style:name="P24" style:family="paragraph" style:parent-style-name="Standard">
      <style:paragraph-properties fo:margin-left="0in" fo:margin-right="0in" fo:line-height="150%" fo:text-align="justify" style:justify-single-word="false" fo:text-indent="0.5in" style:auto-text-indent="false"/>
    </style:style>
    <style:style style:name="P25" style:family="paragraph" style:parent-style-name="Standard">
      <style:paragraph-properties fo:margin-left="0in" fo:margin-right="0in" fo:text-align="justify" style:justify-single-word="false" fo:text-indent="0.5in" style:auto-text-indent="false"/>
    </style:style>
    <style:style style:name="P26" style:family="paragraph" style:parent-style-name="Standard">
      <loext:graphic-properties draw:fill="solid" draw:fill-color="#ffffff"/>
      <style:paragraph-properties fo:margin-left="0in" fo:margin-right="0in" fo:margin-top="0.0417in" fo:margin-bottom="0.1665in" loext:contextual-spacing="false" fo:line-height="150%" fo:text-indent="0.5in" style:auto-text-indent="false" fo:background-color="#ffffff"/>
    </style:style>
    <style:style style:name="P27" style:family="paragraph" style:parent-style-name="Standard">
      <loext:graphic-properties draw:fill="solid" draw:fill-color="#ffffff"/>
      <style:paragraph-properties fo:margin-left="0in" fo:margin-right="0in" fo:margin-top="0.0417in" fo:margin-bottom="0.1665in" loext:contextual-spacing="false" fo:line-height="150%" fo:text-align="justify" style:justify-single-word="false" fo:text-indent="0.5in" style:auto-text-indent="false" fo:background-color="#ffffff"/>
    </style:style>
    <style:style style:name="P28" style:family="paragraph" style:parent-style-name="Standard">
      <loext:graphic-properties draw:fill="solid" draw:fill-color="#ffffff"/>
      <style:paragraph-properties fo:margin-left="0in" fo:margin-right="0in" fo:margin-top="0.0417in" fo:margin-bottom="0.1665in" loext:contextual-spacing="false" fo:line-height="150%" fo:text-align="justify" style:justify-single-word="false" fo:text-indent="0.5in" style:auto-text-indent="false" fo:background-color="#ffffff"/>
      <style:text-properties fo:color="#1f2328" style:font-name="Courier New" fo:font-size="12pt" style:font-name-asian="Courier New1" style:font-size-asian="12pt" style:font-name-complex="Courier New1" style:font-size-complex="12pt"/>
    </style:style>
    <style:style style:name="P29" style:family="paragraph" style:parent-style-name="Standard">
      <loext:graphic-properties draw:fill="solid" draw:fill-color="#100d23"/>
      <style:paragraph-properties fo:margin-left="0in" fo:margin-right="0in" fo:margin-top="0.0417in" fo:margin-bottom="0.1665in" loext:contextual-spacing="false" fo:line-height="100%" fo:text-align="justify" style:justify-single-word="false" fo:text-indent="0.5in" style:auto-text-indent="false" fo:background-color="#100d23"/>
    </style:style>
    <style:style style:name="P30" style:family="paragraph" style:parent-style-name="Standard">
      <style:paragraph-properties fo:margin-left="0in" fo:margin-right="0in" fo:line-height="150%" fo:text-align="justify" style:justify-single-word="false" fo:text-indent="0in" style:auto-text-indent="false"/>
      <style:text-properties style:font-name="Courier New" fo:font-size="12pt" style:font-name-asian="Courier New1" style:font-size-asian="12pt" style:font-name-complex="Courier New1" style:font-size-complex="12pt"/>
    </style:style>
    <style:style style:name="P31" style:family="paragraph" style:parent-style-name="Standard">
      <style:paragraph-properties fo:margin-left="0in" fo:margin-right="0in" fo:line-height="150%" fo:text-align="justify" style:justify-single-word="false" fo:text-indent="0in" style:auto-text-indent="false"/>
    </style:style>
    <style:style style:name="P32"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style:font-name="Courier New" fo:font-size="12pt" style:font-name-asian="Courier New1" style:font-size-asian="12pt" style:font-name-complex="Courier New1" style:font-size-complex="12pt"/>
    </style:style>
    <style:style style:name="P33"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fo:color="#6766b3" style:font-name="Courier New" fo:font-size="10.5pt" style:font-name-asian="Courier New1" style:font-size-asian="10.5pt" style:font-name-complex="Courier New1" style:font-size-complex="10.5pt"/>
    </style:style>
    <style:style style:name="P34" style:family="paragraph" style:parent-style-name="Standard">
      <loext:graphic-properties draw:fill="solid" draw:fill-color="#ffffff"/>
      <style:paragraph-properties fo:margin-left="0in" fo:margin-right="0in" fo:margin-top="0.0417in" fo:margin-bottom="0.1665in" loext:contextual-spacing="false" fo:line-height="150%" fo:text-align="start" style:justify-single-word="false" fo:text-indent="0in" style:auto-text-indent="false" fo:background-color="#ffffff"/>
      <style:text-properties fo:color="#1f2328" style:font-name="Courier New" fo:font-size="12pt" style:font-name-asian="Courier New1" style:font-size-asian="12pt" style:font-name-complex="Courier New1" style:font-size-complex="12pt"/>
    </style:style>
    <style:style style:name="P35" style:family="paragraph" style:parent-style-name="Standard">
      <loext:graphic-properties draw:fill="solid" draw:fill-color="#ffffff"/>
      <style:paragraph-properties fo:margin-left="0in" fo:margin-right="0in" fo:margin-top="0.0417in" fo:margin-bottom="0.1665in" loext:contextual-spacing="false" fo:line-height="150%" fo:text-indent="0in" style:auto-text-indent="false" fo:background-color="#ffffff"/>
      <style:text-properties fo:color="#1f2328" style:font-name="Courier New" fo:font-size="12pt" style:font-name-asian="Courier New1" style:font-size-asian="12pt" style:font-name-complex="Courier New1" style:font-size-complex="12pt"/>
    </style:style>
    <style:style style:name="P36" style:family="paragraph" style:parent-style-name="Standard">
      <loext:graphic-properties draw:fill="solid" draw:fill-color="#ffffff"/>
      <style:paragraph-properties fo:margin-left="0in" fo:margin-right="0in" fo:margin-top="0.0417in" fo:margin-bottom="0.1665in" loext:contextual-spacing="false" fo:line-height="150%" fo:text-align="justify" style:justify-single-word="false" fo:text-indent="0in" style:auto-text-indent="false" fo:background-color="#ffffff"/>
    </style:style>
    <style:style style:name="P37" style:family="paragraph" style:parent-style-name="Standard">
      <loext:graphic-properties draw:fill="solid" draw:fill-color="#ffffff"/>
      <style:paragraph-properties fo:margin-left="0in" fo:margin-right="0in" fo:margin-top="0.0417in" fo:margin-bottom="0.1665in" loext:contextual-spacing="false" fo:line-height="150%" fo:text-indent="0in" style:auto-text-indent="false" fo:background-color="#ffffff"/>
    </style:style>
    <style:style style:name="P38" style:family="paragraph" style:parent-style-name="Standard">
      <loext:graphic-properties draw:fill="solid" draw:fill-color="#100d23"/>
      <style:paragraph-properties fo:margin-left="0in" fo:margin-right="0in" fo:margin-top="0.0417in" fo:margin-bottom="0.1665in" loext:contextual-spacing="false" fo:line-height="100%" fo:text-align="justify" style:justify-single-word="false" fo:text-indent="0in" style:auto-text-indent="false" fo:background-color="#100d23"/>
    </style:style>
    <style:style style:name="P39" style:family="paragraph" style:parent-style-name="Standard" style:list-style-name="WWNum5">
      <style:paragraph-properties fo:margin-left="0.5in" fo:margin-right="0in" fo:line-height="150%" fo:text-align="justify" style:justify-single-word="false" fo:text-indent="-0.25in" style:auto-text-indent="false"/>
    </style:style>
    <style:style style:name="P40" style:family="paragraph" style:parent-style-name="Standard" style:list-style-name="WWNum6">
      <style:paragraph-properties fo:margin-left="0.5in" fo:margin-right="0in" fo:text-align="justify" style:justify-single-word="false" fo:text-indent="-0.25in" style:auto-text-indent="false"/>
    </style:style>
    <style:style style:name="P41" style:family="paragraph" style:parent-style-name="Standard" style:list-style-name="WWNum2">
      <style:paragraph-properties fo:margin-left="0.5in" fo:margin-right="0in" fo:margin-top="0.1665in" fo:margin-bottom="0.1665in" loext:contextual-spacing="false" fo:line-height="150%" fo:text-align="justify" style:justify-single-word="false" fo:text-indent="-0.25in" style:auto-text-indent="false"/>
    </style:style>
    <style:style style:name="P42" style:family="paragraph" style:parent-style-name="Standard" style:list-style-name="WWNum1">
      <style:paragraph-properties fo:margin-left="0.5in" fo:margin-right="0in" fo:margin-top="0.1665in" fo:margin-bottom="0.1665in" loext:contextual-spacing="false" fo:line-height="150%" fo:text-align="justify" style:justify-single-word="false" fo:text-indent="-0.25in" style:auto-text-indent="false"/>
    </style:style>
    <style:style style:name="P43"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44" style:family="paragraph" style:parent-style-name="Standard" style:list-style-name="WWNum3">
      <style:paragraph-properties fo:margin-left="0.5in" fo:margin-right="0in" fo:margin-top="0in" fo:margin-bottom="0in" loext:contextual-spacing="false" fo:line-height="150%" fo:text-align="justify" style:justify-single-word="false" fo:text-indent="-0.25in" style:auto-text-indent="false"/>
    </style:style>
    <style:style style:name="P45" style:family="paragraph" style:parent-style-name="Standard" style:list-style-name="WWNum3">
      <style:paragraph-properties fo:margin-left="0.5in" fo:margin-right="0in" fo:margin-top="0.1665in" fo:margin-bottom="0in" loext:contextual-spacing="false" fo:line-height="150%" fo:text-align="justify" style:justify-single-word="false" fo:text-indent="-0.25in" style:auto-text-indent="false"/>
    </style:style>
    <style:style style:name="P46" style:family="paragraph" style:parent-style-name="Standard" style:list-style-name="WWNum3">
      <style:paragraph-properties fo:margin-left="0.5in" fo:margin-right="0in" fo:margin-top="0in" fo:margin-bottom="0.1665in" loext:contextual-spacing="false" fo:line-height="150%" fo:text-align="justify" style:justify-single-word="false" fo:text-indent="-0.25in" style:auto-text-indent="false"/>
    </style:style>
    <style:style style:name="P47" style:family="paragraph" style:parent-style-name="Standard" style:list-style-name="WWNum4">
      <style:paragraph-properties fo:margin-left="0.7866in" fo:margin-right="0in" fo:line-height="150%" fo:text-align="justify" style:justify-single-word="false" fo:text-indent="-0.25in" style:auto-text-indent="false"/>
    </style:style>
    <style:style style:name="P48" style:family="paragraph" style:parent-style-name="Standard">
      <style:paragraph-properties fo:margin-left="1in" fo:margin-right="0in" fo:line-height="150%" fo:text-align="justify" style:justify-single-word="false" fo:text-indent="0in" style:auto-text-indent="false"/>
    </style:style>
    <style:style style:name="P49" style:family="paragraph" style:parent-style-name="Standard" style:list-style-name="WWNum2">
      <style:paragraph-properties fo:margin-left="1in" fo:margin-right="0in" fo:margin-top="0.1665in" fo:margin-bottom="0in" loext:contextual-spacing="false" fo:line-height="150%" fo:text-align="justify" style:justify-single-word="false" fo:text-indent="-0.25in" style:auto-text-indent="false"/>
    </style:style>
    <style:style style:name="P50" style:family="paragraph" style:parent-style-name="Standard" style:list-style-name="WWNum2">
      <style:paragraph-properties fo:margin-left="1in" fo:margin-right="0in" fo:margin-top="0in" fo:margin-bottom="0in" loext:contextual-spacing="false" fo:line-height="150%" fo:text-indent="-0.25in" style:auto-text-indent="false"/>
    </style:style>
    <style:style style:name="P51" style:family="paragraph" style:parent-style-name="Standard" style:list-style-name="WWNum2">
      <style:paragraph-properties fo:margin-left="1in" fo:margin-right="0in" fo:margin-top="0in" fo:margin-bottom="0in" loext:contextual-spacing="false" fo:line-height="150%" fo:text-align="justify" style:justify-single-word="false" fo:text-indent="-0.25in" style:auto-text-indent="false"/>
    </style:style>
    <style:style style:name="P52" style:family="paragraph" style:parent-style-name="Standard" style:list-style-name="WWNum2">
      <style:paragraph-properties fo:margin-left="1in" fo:margin-right="0in" fo:margin-top="0in" fo:margin-bottom="0.1665in" loext:contextual-spacing="false" fo:line-height="150%" fo:text-align="justify" style:justify-single-word="false" fo:text-indent="-0.25in" style:auto-text-indent="false"/>
    </style:style>
    <style:style style:name="P53" style:family="paragraph" style:parent-style-name="Standard" style:list-style-name="WWNum6">
      <style:paragraph-properties fo:margin-left="1in" fo:margin-right="0in" fo:text-align="justify" style:justify-single-word="false" fo:text-indent="-0.25in" style:auto-text-indent="false"/>
    </style:style>
    <style:style style:name="P54" style:family="paragraph" style:parent-style-name="Standard" style:list-style-name="WWNum2">
      <style:paragraph-properties fo:margin-left="1.5in" fo:margin-right="0in" fo:margin-top="0in" fo:margin-bottom="0in" loext:contextual-spacing="false" fo:line-height="150%" fo:text-indent="-0.25in" style:auto-text-indent="false"/>
    </style:style>
    <style:style style:name="P55" style:family="paragraph" style:parent-style-name="Standard" style:master-page-name="Converted1">
      <style:paragraph-properties fo:line-height="100%" fo:text-align="justify" style:justify-single-word="false" style:page-number="auto"/>
    </style:style>
    <style:style style:name="P56" style:family="paragraph" style:parent-style-name="Standard" style:master-page-name="Converted2">
      <style:paragraph-properties fo:line-height="100%" fo:text-align="justify" style:justify-single-word="false" style:page-number="auto"/>
    </style:style>
    <style:style style:name="P57" style:family="paragraph" style:parent-style-name="Standard" style:master-page-name="Converted3">
      <style:paragraph-properties fo:line-height="100%" style:page-number="auto"/>
    </style:style>
    <style:style style:name="P58" style:family="paragraph" style:parent-style-name="Standard">
      <style:paragraph-properties fo:margin-top="0.1665in" fo:margin-bottom="0.1665in" loext:contextual-spacing="false" fo:line-height="150%" fo:text-align="justify" style:justify-single-word="false"/>
      <style:text-properties style:font-name="Courier New" fo:font-size="3pt" style:font-name-asian="Courier New1" style:font-size-asian="3pt" style:font-name-complex="Courier New1" style:font-size-complex="3pt"/>
    </style:style>
    <style:style style:name="P59" style:family="paragraph" style:parent-style-name="Standard">
      <style:paragraph-properties fo:margin-top="0.1665in" fo:margin-bottom="0.1665in" loext:contextual-spacing="false" fo:line-height="150%" fo:text-align="justify" style:justify-single-word="false"/>
      <style:text-properties style:font-name="Courier New" fo:font-size="2pt" style:font-name-asian="Courier New1" style:font-size-asian="2pt" style:font-name-complex="Courier New1" style:font-size-complex="2pt"/>
    </style:style>
    <style:style style:name="P60" style:family="paragraph" style:parent-style-name="Standard">
      <style:paragraph-properties fo:margin-top="0.1665in" fo:margin-bottom="0.1665in" loext:contextual-spacing="false" fo:line-height="150%" fo:text-align="justify" style:justify-single-word="false"/>
      <style:text-properties style:font-name="Courier New" fo:font-size="12pt" style:font-name-asian="Courier New1" style:font-size-asian="12pt" style:font-name-complex="Courier New1" style:font-size-complex="12pt"/>
    </style:style>
    <style:style style:name="P61" style:family="paragraph" style:parent-style-name="Standard">
      <style:paragraph-properties fo:margin-top="0.1665in" fo:margin-bottom="0.1665in" loext:contextual-spacing="false" fo:line-height="150%" fo:text-align="justify" style:justify-single-word="false"/>
      <style:text-properties fo:color="#1f2328" style:font-name="Courier New" fo:font-size="3pt" style:font-name-asian="Courier New1" style:font-size-asian="3pt" style:font-name-complex="Courier New1" style:font-size-complex="3pt" fo:background-color="#ffffff"/>
    </style:style>
    <style:style style:name="P62" style:family="paragraph" style:parent-style-name="Standard">
      <loext:graphic-properties draw:fill="solid" draw:fill-color="#100d23"/>
      <style:paragraph-properties fo:margin-top="0.1665in" fo:margin-bottom="0.1665in" loext:contextual-spacing="false" fo:line-height="100%" fo:keep-together="always" fo:background-color="#100d23"/>
    </style:style>
    <style:style style:name="P63" style:family="paragraph" style:parent-style-name="Standard">
      <loext:graphic-properties draw:fill="solid" draw:fill-color="#100d23"/>
      <style:paragraph-properties fo:margin-top="0.1665in" fo:margin-bottom="0.1665in" loext:contextual-spacing="false" fo:line-height="100%" fo:keep-together="always" fo:background-color="#100d23"/>
      <style:text-properties fo:color="#00ff9c" style:font-name="Courier New" fo:font-size="10.5pt" style:font-name-asian="Courier New1" style:font-size-asian="10.5pt" style:font-name-complex="Courier New1" style:font-size-complex="10.5pt"/>
    </style:style>
    <style:style style:name="P64" style:family="paragraph" style:parent-style-name="Standard">
      <loext:graphic-properties draw:fill="solid" draw:fill-color="#ffffff"/>
      <style:paragraph-properties fo:margin-left="0in" fo:margin-right="0in" fo:margin-top="0.0417in" fo:margin-bottom="0.1665in" loext:contextual-spacing="false" fo:line-height="150%" fo:text-indent="0.5in" style:auto-text-indent="false" fo:background-color="#ffffff"/>
    </style:style>
    <style:style style:name="P65" style:family="paragraph" style:parent-style-name="Standard">
      <loext:graphic-properties draw:fill="solid" draw:fill-color="#ffffff"/>
      <style:paragraph-properties fo:margin-left="0in" fo:margin-right="0in" fo:margin-top="0.0417in" fo:margin-bottom="0.1665in" loext:contextual-spacing="false" fo:line-height="150%" fo:text-align="start" style:justify-single-word="false" fo:text-indent="0.5in" style:auto-text-indent="false" fo:background-color="#ffffff"/>
    </style:style>
    <style:style style:name="P66" style:family="paragraph" style:parent-style-name="Standard">
      <loext:graphic-properties draw:fill="solid" draw:fill-color="#ffffff"/>
      <style:paragraph-properties fo:margin-left="0in" fo:margin-right="0in" fo:margin-top="0.0417in" fo:margin-bottom="0.1665in" loext:contextual-spacing="false" fo:line-height="150%" fo:text-align="justify" style:justify-single-word="false" fo:text-indent="0.5in" style:auto-text-indent="false" fo:background-color="#ffffff"/>
    </style:style>
    <style:style style:name="P67"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style>
    <style:style style:name="P68" style:family="paragraph" style:parent-style-name="Standard">
      <style:paragraph-properties fo:margin-left="0in" fo:margin-right="0in" fo:margin-top="0.1665in" fo:margin-bottom="0.1665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Courier New" fo:font-size="12pt" style:font-name-asian="Courier New1" style:font-size-asian="12pt" style:font-name-complex="Courier New1" style:font-size-complex="12pt"/>
    </style:style>
    <style:style style:name="P6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70" style:family="paragraph" style:parent-style-name="Standard">
      <style:paragraph-properties fo:margin-left="0in" fo:margin-right="0in" fo:margin-top="0.1665in" fo:margin-bottom="0.1665in" loext:contextual-spacing="false" fo:line-height="150%" fo:text-align="justify" style:justify-single-word="false" fo:keep-together="auto" fo:orphans="2" fo:widows="2" fo:text-indent="0.5in" style:auto-text-indent="false" fo:break-before="auto" fo:break-after="auto" fo:padding="0in" fo:border="none" fo:keep-with-next="auto"/>
    </style:style>
    <style:style style:name="P71" style:family="paragraph" style:parent-style-name="Standard">
      <loext:graphic-properties draw:fill="solid" draw:fill-color="#100d23"/>
      <style:paragraph-properties fo:margin-left="-0.098in" fo:margin-right="0in" fo:margin-top="0.0417in" fo:margin-bottom="0.1665in" loext:contextual-spacing="false" fo:line-height="100%" fo:text-indent="0in" style:auto-text-indent="false" fo:background-color="#100d23"/>
    </style:style>
    <style:style style:name="P72" style:family="paragraph" style:parent-style-name="Standard">
      <loext:graphic-properties draw:fill="solid" draw:fill-color="#100d23"/>
      <style:paragraph-properties fo:margin-left="-0.098in" fo:margin-right="0in" fo:margin-top="0.0417in" fo:margin-bottom="0.1665in" loext:contextual-spacing="false" fo:line-height="100%" fo:text-indent="0.098in" style:auto-text-indent="false" fo:background-color="#100d23"/>
    </style:style>
    <style:style style:name="P73" style:family="paragraph" style:parent-style-name="Standard">
      <loext:graphic-properties draw:fill="solid" draw:fill-color="#100d23"/>
      <style:paragraph-properties fo:margin-left="0in" fo:margin-right="-0.0008in" fo:margin-top="0.0417in" fo:margin-bottom="0.1665in" loext:contextual-spacing="false" fo:line-height="100%" fo:text-indent="0in" style:auto-text-indent="false" fo:background-color="#100d23"/>
    </style:style>
    <style:style style:name="P74" style:family="paragraph" style:parent-style-name="Standard">
      <loext:graphic-properties draw:fill="solid" draw:fill-color="#100d23"/>
      <style:paragraph-properties fo:margin-left="0in" fo:margin-right="-0.0008in" fo:margin-top="0.0417in" fo:margin-bottom="0.1665in" loext:contextual-spacing="false" fo:line-height="100%" fo:text-indent="0in" style:auto-text-indent="false" fo:background-color="#100d23"/>
      <style:text-properties fo:color="#00b0ff" style:font-name="Courier New" fo:font-size="10.5pt" style:font-name-asian="Courier New1" style:font-size-asian="10.5pt" style:font-name-complex="Courier New1" style:font-size-complex="10.5pt"/>
    </style:style>
    <style:style style:name="P75" style:family="paragraph" style:parent-style-name="Standard">
      <loext:graphic-properties draw:fill="solid" draw:fill-color="#100d23"/>
      <style:paragraph-properties fo:margin-left="0in" fo:margin-right="-0.0008in" fo:margin-top="0.0417in" fo:margin-bottom="0.1665in" loext:contextual-spacing="false" fo:line-height="100%" fo:text-indent="0.5in" style:auto-text-indent="false" fo:background-color="#100d23"/>
    </style:style>
    <style:style style:name="P76" style:family="paragraph" style:parent-style-name="Standard">
      <loext:graphic-properties draw:fill="solid" draw:fill-color="#100d23"/>
      <style:paragraph-properties fo:margin-top="0.0417in" fo:margin-bottom="0.1665in" loext:contextual-spacing="false" fo:line-height="100%" fo:background-color="#100d23"/>
    </style:style>
    <style:style style:name="P77" style:family="paragraph" style:parent-style-name="Standard">
      <loext:graphic-properties draw:fill="solid" draw:fill-color="#ffffff"/>
      <style:paragraph-properties fo:margin-top="0.0417in" fo:margin-bottom="0.1665in" loext:contextual-spacing="false" fo:line-height="150%" fo:background-color="#ffffff"/>
      <style:text-properties fo:color="#1f2328" style:font-name="Courier New" fo:font-size="12pt" style:font-name-asian="Courier New1" style:font-size-asian="12pt" style:font-name-complex="Courier New1" style:font-size-complex="12pt"/>
    </style:style>
    <style:style style:name="P78" style:family="paragraph" style:parent-style-name="Standard">
      <loext:graphic-properties draw:fill="solid" draw:fill-color="#ffffff"/>
      <style:paragraph-properties fo:margin-top="0.0417in" fo:margin-bottom="0.1665in" loext:contextual-spacing="false" fo:line-height="150%" fo:text-align="justify" style:justify-single-word="false" fo:background-color="#ffffff"/>
    </style:style>
    <style:style style:name="P79" style:family="paragraph" style:parent-style-name="Standard" style:master-page-name="Converted4">
      <style:paragraph-properties fo:line-height="100%" fo:text-align="justify" style:justify-single-word="false" style:page-number="auto"/>
    </style:style>
    <style:style style:name="P80" style:family="paragraph" style:parent-style-name="Standard">
      <loext:graphic-properties draw:fill="solid" draw:fill-color="#100d23"/>
      <style:paragraph-properties fo:margin-left="-0.3929in" fo:margin-right="0in" fo:margin-top="0.0417in" fo:margin-bottom="0.1665in" loext:contextual-spacing="false" fo:line-height="100%" fo:text-indent="0in" style:auto-text-indent="false" fo:background-color="#100d23"/>
    </style:style>
    <style:style style:name="P81" style:family="paragraph" style:parent-style-name="Standard">
      <loext:graphic-properties draw:fill="solid" draw:fill-color="#100d23"/>
      <style:paragraph-properties fo:margin-left="-0.3929in" fo:margin-right="0in" fo:margin-top="0.0417in" fo:margin-bottom="0.1665in" loext:contextual-spacing="false" fo:line-height="100%" fo:text-align="justify" style:justify-single-word="false" fo:text-indent="0in" style:auto-text-indent="false" fo:background-color="#100d23"/>
    </style:style>
    <style:style style:name="P82" style:family="paragraph" style:parent-style-name="Standard">
      <loext:graphic-properties draw:fill="solid" draw:fill-color="#100d23"/>
      <style:paragraph-properties fo:margin-left="-0.3929in" fo:margin-right="0in" fo:margin-top="0.0417in" fo:margin-bottom="0.1665in" loext:contextual-spacing="false" fo:line-height="100%" fo:text-indent="0.3929in" style:auto-text-indent="false" fo:background-color="#100d23"/>
    </style:style>
    <style:style style:name="P83" style:family="paragraph" style:parent-style-name="Heading_20_1">
      <style:paragraph-properties fo:line-height="150%" fo:text-align="center" style:justify-single-word="false"/>
    </style:style>
    <style:style style:name="P84" style:family="paragraph" style:parent-style-name="Heading_20_1">
      <style:paragraph-properties fo:text-align="justify" style:justify-single-word="false"/>
    </style:style>
    <style:style style:name="P85" style:family="paragraph" style:parent-style-name="Heading_20_1">
      <style:paragraph-properties fo:margin-top="0.1945in" fo:margin-bottom="0.0555in" loext:contextual-spacing="false" fo:line-height="150%" fo:text-align="center" style:justify-single-word="false" fo:keep-together="auto" fo:break-before="page" fo:keep-with-next="auto"/>
    </style:style>
    <style:style style:name="P86" style:family="paragraph" style:parent-style-name="Heading_20_1">
      <style:paragraph-properties fo:margin-top="0.1665in" fo:margin-bottom="0.1665in" loext:contextual-spacing="false" fo:line-height="150%" fo:text-align="center" style:justify-single-word="false"/>
    </style:style>
    <style:style style:name="P87" style:family="paragraph" style:parent-style-name="Heading_20_2">
      <style:paragraph-properties fo:margin-top="0.1945in" fo:margin-bottom="0.0555in" loext:contextual-spacing="false" fo:line-height="100%" fo:keep-together="auto" fo:keep-with-next="auto"/>
    </style:style>
    <style:style style:name="P88" style:family="paragraph" style:parent-style-name="Heading_20_3">
      <style:paragraph-properties fo:margin-top="0.1945in" fo:margin-bottom="0.1665in" loext:contextual-spacing="false" fo:line-height="150%" fo:text-align="center" style:justify-single-word="false" fo:keep-together="auto" fo:keep-with-next="auto"/>
      <style:text-properties fo:color="#000000" style:font-name="Courier New" fo:font-size="13pt" fo:font-weight="bold" style:font-name-asian="Courier New1" style:font-size-asian="13pt" style:font-weight-asian="bold" style:font-name-complex="Courier New1" style:font-size-complex="13pt" style:font-weight-complex="bold"/>
    </style:style>
    <style:style style:name="P89" style:family="paragraph" style:parent-style-name="Heading_20_3">
      <loext:graphic-properties draw:fill="solid" draw:fill-color="#ffffff"/>
      <style:paragraph-properties fo:margin-left="0.5in" fo:margin-right="0in" fo:margin-top="0.0417in" fo:margin-bottom="0.1665in" loext:contextual-spacing="false" fo:line-height="150%" fo:text-align="center" style:justify-single-word="false" fo:text-indent="0in" style:auto-text-indent="false" fo:background-color="#ffffff"/>
    </style:style>
    <style:style style:name="T1" style:family="text">
      <style:text-properties style:font-name="Courier New" fo:font-size="19pt" fo:font-weight="bold" style:font-name-asian="Courier New1" style:font-size-asian="19pt" style:font-weight-asian="bold" style:font-name-complex="Courier New1" style:font-size-complex="19pt" style:font-weight-complex="bold"/>
    </style:style>
    <style:style style:name="T2" style:family="text">
      <style:text-properties style:font-name="Courier New" fo:font-size="17pt" style:font-name-asian="Courier New1" style:font-size-asian="17pt" style:font-name-complex="Courier New1" style:font-size-complex="17pt"/>
    </style:style>
    <style:style style:name="T3" style:family="text">
      <style:text-properties style:font-name="Courier New" style:font-name-asian="Courier New1" style:font-name-complex="Courier New1"/>
    </style:style>
    <style:style style:name="T4" style:family="text">
      <style:text-properties style:font-name="Courier New" fo:font-size="12pt" style:font-name-asian="Courier New1" style:font-size-asian="12pt" style:font-name-complex="Courier New1" style:font-size-complex="12pt"/>
    </style:style>
    <style:style style:name="T5" style:family="text">
      <style:text-properties style:font-name="Courier New" fo:font-size="12pt" fo:font-style="italic" style:font-name-asian="Courier New1" style:font-size-asian="12pt" style:font-style-asian="italic" style:font-name-complex="Courier New1" style:font-size-complex="12pt" style:font-style-complex="italic"/>
    </style:style>
    <style:style style:name="T6" style:family="text">
      <style:text-properties style:font-name="Courier New"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7" style:family="text">
      <style:text-properties style:font-name="Courier New" fo:font-size="12pt" fo:font-style="italic" style:text-underline-style="none" style:font-name-asian="Courier New1" style:font-size-asian="12pt" style:font-style-asian="italic" style:font-name-complex="Courier New1" style:font-size-complex="12pt" style:font-style-complex="italic"/>
    </style:style>
    <style:style style:name="T8" style:family="text">
      <style:text-properties style:font-name="Courier New" fo:font-size="12pt" fo:font-weight="bold" style:font-name-asian="Courier New1" style:font-size-asian="12pt" style:font-weight-asian="bold" style:font-name-complex="Courier New1" style:font-size-complex="12pt" style:font-weight-complex="bold"/>
    </style:style>
    <style:style style:name="T9" style:family="text">
      <style:text-properties style:font-name="Courier New" fo:font-size="12pt" style:text-underline-style="solid" style:text-underline-width="auto" style:text-underline-color="font-color" style:font-name-asian="Courier New1" style:font-size-asian="12pt" style:font-name-complex="Courier New1" style:font-size-complex="12pt"/>
    </style:style>
    <style:style style:name="T10" style:family="text">
      <style:text-properties style:font-name="Courier New" fo:font-size="12pt" style:text-underline-style="none" style:font-name-asian="Courier New1" style:font-size-asian="12pt" style:font-name-complex="Courier New1" style:font-size-complex="12pt"/>
    </style:style>
    <style:style style:name="T11" style:family="text">
      <style:text-properties style:font-name="Courier New" fo:font-weight="bold" style:font-name-asian="Courier New1" style:font-weight-asian="bold" style:font-name-complex="Courier New1" style:font-weight-complex="bold"/>
    </style:style>
    <style:style style:name="T12" style:family="text">
      <style:text-properties fo:font-variant="normal" fo:text-transform="none" fo:color="#000000" style:text-line-through-style="none" style:text-line-through-type="none" style:text-position="0% 100%" style:font-name="Courier New" fo:font-size="11pt"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1pt" fo:font-style="normal" style:text-underline-style="none" style:font-name-asian="Courier New1" style:font-size-asian="11pt" style:font-style-asian="normal" style:font-name-complex="Courier New1" style:font-size-complex="11pt" style:font-style-complex="normal"/>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17" style:family="text">
      <style:text-properties fo:color="#1155cc" style:font-name="Courier New" fo:font-size="12pt" style:text-underline-style="solid" style:text-underline-width="auto" style:text-underline-color="font-color" fo:font-weight="bold" style:font-name-asian="Courier New1" style:font-size-asian="12pt" style:font-weight-asian="bold" style:font-name-complex="Courier New1" style:font-size-complex="12pt" style:font-weight-complex="bold"/>
    </style:style>
    <style:style style:name="T18" style:family="text">
      <style:text-properties fo:color="#1155cc" style:font-name="Courier New" style:text-underline-style="solid" style:text-underline-width="auto" style:text-underline-color="font-color" fo:font-weight="bold" style:font-name-asian="Courier New1" style:font-weight-asian="bold" style:font-name-complex="Courier New1" style:font-weight-complex="bold"/>
    </style:style>
    <style:style style:name="T19" style:family="text">
      <style:text-properties fo:color="#1155cc" style:text-underline-style="solid" style:text-underline-width="auto" style:text-underline-color="font-color" fo:font-weight="bold" style:font-weight-asian="bold" style:font-weight-complex="bold"/>
    </style:style>
    <style:style style:name="T20" style:family="text">
      <style:text-properties fo:color="#1155cc" style:text-underline-style="solid" style:text-underline-width="auto" style:text-underline-color="font-color"/>
    </style:style>
    <style:style style:name="T21" style:family="text">
      <style:text-properties fo:font-size="12pt" style:font-size-asian="12pt" style:font-size-complex="12pt"/>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color="#188038" style:font-name="Courier New" fo:font-size="12pt" style:font-name-asian="Courier New1" style:font-size-asian="12pt" style:font-name-complex="Courier New1" style:font-size-complex="12pt"/>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style:text-position="super 58%"/>
    </style:style>
    <style:style style:name="T27" style:family="text">
      <style:text-properties style:text-position="super 58%" style:font-name="Courier New" fo:font-size="12pt" style:font-name-asian="Courier New1" style:font-size-asian="12pt" style:font-name-complex="Courier New1" style:font-size-complex="12pt"/>
    </style:style>
    <style:style style:name="T28" style:family="text">
      <style:text-properties style:text-position="super 58%" style:font-name="Courier New" fo:font-size="12pt" fo:font-weight="bold" style:font-name-asian="Courier New1" style:font-size-asian="12pt" style:font-weight-asian="bold" style:font-name-complex="Courier New1" style:font-size-complex="12pt" style:font-weight-complex="bold"/>
    </style:style>
    <style:style style:name="T29" style:family="text">
      <style:text-properties fo:font-size="10pt" style:font-size-asian="10pt" style:font-size-complex="10pt"/>
    </style:style>
    <style:style style:name="T30" style:family="text">
      <style:text-properties fo:color="#1f2328" style:font-name="Courier New" fo:font-size="12pt" style:font-name-asian="Courier New1" style:font-size-asian="12pt" style:font-name-complex="Courier New1" style:font-size-complex="12pt" fo:background-color="#ffffff"/>
    </style:style>
    <style:style style:name="T31" style:family="text">
      <style:text-properties fo:color="#1f2328" style:font-name="Courier New" fo:font-size="12pt" style:font-name-asian="Courier New1" style:font-size-asian="12pt" style:font-name-complex="Courier New1" style:font-size-complex="12pt"/>
    </style:style>
    <style:style style:name="T32" style:family="text">
      <style:text-properties fo:color="#1f2328" style:font-name="Courier New" fo:font-size="12pt" fo:font-weight="bold" style:font-name-asian="Courier New1" style:font-size-asian="12pt" style:font-weight-asian="bold" style:font-name-complex="Courier New1" style:font-size-complex="12pt" style:font-weight-complex="bold" fo:background-color="#ffffff"/>
    </style:style>
    <style:style style:name="T33" style:family="text">
      <style:text-properties fo:color="#1f2328" style:font-name="Courier New" fo:font-size="12pt" fo:font-weight="bold" style:font-name-asian="Courier New1" style:font-size-asian="12pt" style:font-weight-asian="bold" style:font-name-complex="Courier New1" style:font-size-complex="12pt" style:font-weight-complex="bold"/>
    </style:style>
    <style:style style:name="T34" style:family="text">
      <style:text-properties fo:color="#1f2328" style:font-name="Courier New" fo:font-size="12pt" fo:font-style="italic" fo:font-weight="bold" style:font-name-asian="Courier New1" style:font-size-asian="12pt" style:font-style-asian="italic" style:font-weight-asian="bold" style:font-name-complex="Courier New1" style:font-size-complex="12pt" style:font-style-complex="italic" style:font-weight-complex="bold" fo:background-color="#ffffff"/>
    </style:style>
    <style:style style:name="T35" style:family="text">
      <style:text-properties fo:color="#1f2328" style:font-name="Courier New"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6" style:family="text">
      <style:text-properties fo:color="#1f2328" style:font-name="Courier New" fo:font-size="12pt" fo:font-style="italic" style:font-name-asian="Courier New1" style:font-size-asian="12pt" style:font-style-asian="italic" style:font-name-complex="Courier New1" style:font-size-complex="12pt" style:font-style-complex="italic"/>
    </style:style>
    <style:style style:name="T37" style:family="text">
      <style:text-properties fo:color="#1f2328" style:font-name="Courier New" fo:font-size="10pt" style:font-name-asian="Courier New1" style:font-size-asian="10pt" style:font-name-complex="Courier New1" style:font-size-complex="10pt"/>
    </style:style>
    <style:style style:name="T38" style:family="text">
      <style:text-properties fo:color="#1f2328" style:text-position="super 58%" style:font-name="Courier New" fo:font-size="12pt" style:font-name-asian="Courier New1" style:font-size-asian="12pt" style:font-name-complex="Courier New1" style:font-size-complex="12pt"/>
    </style:style>
    <style:style style:name="T39" style:family="text">
      <style:text-properties fo:font-size="17pt" fo:font-weight="bold" style:font-size-asian="17pt" style:font-weight-asian="bold" style:font-size-complex="17pt" style:font-weight-complex="bold"/>
    </style:style>
    <style:style style:name="T40" style:family="text">
      <style:text-properties fo:color="#00b0ff" style:font-name="Courier New" fo:font-size="10.5pt" style:font-name-asian="Courier New1" style:font-size-asian="10.5pt" style:font-name-complex="Courier New1" style:font-size-complex="10.5pt"/>
    </style:style>
    <style:style style:name="T41" style:family="text">
      <style:text-properties fo:color="#00ff9c" style:font-name="Courier New" fo:font-size="10.5pt" style:font-name-asian="Courier New1" style:font-size-asian="10.5pt" style:font-name-complex="Courier New1" style:font-size-complex="10.5pt"/>
    </style:style>
    <style:style style:name="T42" style:family="text">
      <style:text-properties fo:color="#6766b3" style:font-name="Courier New" fo:font-size="10.5pt" fo:font-style="italic" style:font-name-asian="Courier New1" style:font-size-asian="10.5pt" style:font-style-asian="italic" style:font-name-complex="Courier New1" style:font-size-complex="10.5pt" style:font-style-complex="italic"/>
    </style:style>
    <style:style style:name="T43" style:family="text">
      <style:text-properties fo:color="#d57bff" style:font-name="Courier New" fo:font-size="10.5pt" style:font-name-asian="Courier New1" style:font-size-asian="10.5pt" style:font-name-complex="Courier New1" style:font-size-complex="10.5pt"/>
    </style:style>
    <style:style style:name="T44" style:family="text">
      <style:text-properties fo:color="#b4baff" style:font-name="Courier New" fo:font-size="10.5pt" style:font-name-asian="Courier New1" style:font-size-asian="10.5pt" style:font-name-complex="Courier New1" style:font-size-complex="10.5pt"/>
    </style:style>
    <style:style style:name="T45" style:family="text">
      <style:text-properties fo:color="#fffc58" style:font-name="Courier New" fo:font-size="10.5pt" style:font-name-asian="Courier New1" style:font-size-asian="10.5pt" style:font-name-complex="Courier New1" style:font-size-complex="10.5pt"/>
    </style:style>
    <style:style style:name="T46" style:family="text">
      <style:text-properties fo:color="#76c1ff" style:font-name="Courier New" fo:font-size="10.5pt" style:font-name-asian="Courier New1" style:font-size-asian="10.5pt" style:font-name-complex="Courier New1" style:font-size-complex="10.5pt"/>
    </style:style>
    <style:style style:name="T47" style:family="text">
      <style:text-properties fo:color="#eeffff" style:font-name="Courier New" fo:font-size="10.5pt" style:font-name-asian="Courier New1" style:font-size-asian="10.5pt" style:font-name-complex="Courier New1" style:font-size-complex="10.5pt"/>
    </style:style>
    <style:style style:name="T48" style:family="text">
      <style:text-properties fo:color="#89ddff" style:font-name="Courier New" fo:font-size="10.5pt" style:font-name-asian="Courier New1" style:font-size-asian="10.5pt" style:font-name-complex="Courier New1" style:font-size-complex="10.5pt"/>
    </style:style>
    <style:style style:name="T49" style:family="text">
      <style:text-properties fo:font-style="italic" style:font-style-asian="italic" style:font-style-complex="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oft-page-break/><text:span text:style-name="T1">Componentes y Modelos de Componentes</text:span> </text:p>
      <text:p text:style-name="P15"/>
      <text:p text:style-name="P14"><text:span text:style-name="T2">ÍNDICE</text:span></text:p>
      <text:p text:style-name="P1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ta5ru3f9m0dh" text:style-name="Index_20_Link" text:visited-style-name="Index_20_Link"><text:span text:style-name="T12">Marco Teórico: Componentes (Ian Sommerville)<text:tab/>1</text:span></text:a></text:p>
          <text:p text:style-name="P17"><text:a xlink:type="simple" xlink:href="#_q7hh9ijnmk6" text:style-name="Index_20_Link" text:visited-style-name="Index_20_Link"><text:span text:style-name="T12">Marco Teórico: Modelos de Componentes (Ian Sommerville)<text:tab/>2</text:span></text:a></text:p>
          <text:p text:style-name="P17"><text:a xlink:type="simple" xlink:href="#_142tp2nw15rd" text:style-name="Index_20_Link" text:visited-style-name="Index_20_Link"><text:span text:style-name="T12">Un ejemplo didáctico para entender cómo crear una muestra de modelo de componentes desde cero en C++<text:tab/>8</text:span></text:a></text:p>
          <text:p text:style-name="P19"><text:a xlink:type="simple" xlink:href="#_8dorypuy5qtv" text:style-name="Index_20_Link" text:visited-style-name="Index_20_Link"><text:span text:style-name="T12">¿Por qué esta arquitectura es robusta?<text:tab/>9</text:span></text:a></text:p>
          <text:p text:style-name="P17"><text:a xlink:type="simple" xlink:href="#_d4rjxcfib62c" text:style-name="Index_20_Link" text:visited-style-name="Index_20_Link"><text:span text:style-name="T12">Implementación de con ejemplo de componente Saludador (Greeter)<text:tab/>11</text:span></text:a></text:p>
          <text:p text:style-name="P20"><text:a xlink:type="simple" xlink:href="#_dij3zvudmkr8" text:style-name="Index_20_Link" text:visited-style-name="Index_20_Link"><text:span text:style-name="T13">i_component.hpp:<text:tab/>11</text:span></text:a></text:p>
          <text:p text:style-name="P20"><text:a xlink:type="simple" xlink:href="#_1m5mlpumuy40" text:style-name="Index_20_Link" text:visited-style-name="Index_20_Link"><text:span text:style-name="T3">i_greeter.hpp</text:span></text:a><text:a xlink:type="simple" xlink:href="#_1m5mlpumuy40" text:style-name="Index_20_Link" text:visited-style-name="Index_20_Link"><text:span text:style-name="T13">:<text:tab/>13</text:span></text:a></text:p>
          <text:p text:style-name="P20"><text:a xlink:type="simple" xlink:href="#_fjuhmwhgjplf" text:style-name="Index_20_Link" text:visited-style-name="Index_20_Link"><text:span text:style-name="T13">shared_library.hpp:<text:tab/>14</text:span></text:a></text:p>
          <text:p text:style-name="P20"><text:a xlink:type="simple" xlink:href="#_u4ylrygv52cl" text:style-name="Index_20_Link" text:visited-style-name="Index_20_Link"><text:span text:style-name="T13">module_manager.hpp:<text:tab/>17</text:span></text:a></text:p>
          <text:p text:style-name="P17"><text:a xlink:type="simple" xlink:href="#_y5kggxj7ibvj" text:style-name="Index_20_Link" text:visited-style-name="Index_20_Link"><text:span text:style-name="T12">Gestión Segura del Ciclo de Vida Cruzado (Custom Deleter &amp; RAII)<text:tab/>22</text:span></text:a></text:p>
          <text:p text:style-name="P20"><text:a xlink:type="simple" xlink:href="#_sxh44jwvol9" text:style-name="Index_20_Link" text:visited-style-name="Index_20_Link"><text:span text:style-name="T14">greeter_component.cpp:<text:tab/>23</text:span></text:a></text:p>
        </text:index-body>
      </text:table-of-content>
      <text:p text:style-name="P88"><text:bookmark text:name="_k7lriimujll3"/></text:p>
      <text:p text:style-name="P85"><text:bookmark text:name="_ta5ru3f9m0dh"/>Marco Teórico: Componentes (Ian Sommerville)</text:p>
      <text:p text:style-name="P22"/>
      <text:p text:style-name="P24"><text:span text:style-name="T4">Un componente puede ser definido como un elemento de software que se conforma a un modelo de componentes estándar y puede desplegarse y componerse independientemente sin modificación, de acuerdo con un estándar de composición.<text:line-break/></text:span></text:p>
      <text:p text:style-name="P24"><text:span text:style-name="T4">También un componente de software es una unidad de composición con interfaces especificadas contractualmente y sólo con dependencias de contexto explícitas. Un componente de software puede implementarse de manera independiente y puede estar sujeto a composición por terceras partes.</text:span></text:p>
      <text:p text:style-name="P22"><draw:frame draw:style-name="fr1" draw:name="image2.png" text:anchor-type="char" svg:x="-0.3228in" svg:y="0.4583in" svg:width="7.0953in" svg:height="5.2374in" draw:z-index="1"><draw:image xlink:href="Pictures/10000000000003730000028CD6B9915F45D43D5F.png" xlink:type="simple" xlink:show="embed" xlink:actuate="onLoad" loext:mime-type="image/png"/></draw:frame></text:p>
      <text:p text:style-name="P30"/>
      <text:p text:style-name="P7"><text:span text:style-name="T4">Visualizar un componente como un proveedor de servicio pone de relieve dos características críticas de un componente de reutilización:</text:span></text:p>
      <text:list xml:id="list1391628254" text:style-name="WWNum5">
        <text:list-item>
          <text:p text:style-name="P39"><text:span text:style-name="T4">El componente es una entidad ejecutable independiente definida mediante sus interfaces. </text:span><text:span text:style-name="T5">Para usarlo no se necesita conocimiento alguno de su código fuente.</text:span><text:span text:style-name="T4"> Puede hacerse referencia a él como un servicio externo o incluirse directamente en un programa.</text:span></text:p>
        </text:list-item>
      </text:list>
      <text:p text:style-name="P2"/>
      <text:list xml:id="list70410719407054" text:continue-numbering="true" text:style-name="WWNum5">
        <text:list-item>
          <text:p text:style-name="P39"><text:span text:style-name="T4">Los servicios ofrecidos por un componente se ponen a disposición mediante una interfaz, y todas las interacciones por dicha interfaz. </text:span><text:span text:style-name="T5">La interfaz del componente se expresa en términos de operaciones parametrizadas y nunca se expone su estado interno.</text:span></text:p>
        </text:list-item>
      </text:list>
      <text:p text:style-name="Heading_20_1"><text:bookmark text:name="_q7hh9ijnmk6"/>Marco Teórico: Modelos de Componentes (Ian Sommerville)</text:p>
      <text:p text:style-name="P23"/>
      <text:p text:style-name="P24"><text:span text:style-name="T4">Un modelo de componentes es una definición de estándares para implementación, documentación y despliegue de componentes. Estos estándares se establecen con la finalidad de que los desarrolladores de componentes se aseguren de que éstos pueden interoperar.</text:span></text:p>
      <text:p text:style-name="P24"><text:span text:style-name="T4">También funcionan para proveedores de infraestructuras de ejecución de componentes que ofrecen middleware para apoyar la ejecución de componentes. Se han propuesto muchos modelos de componentes, pero ahora los modelos más importantes son el modelo WebServices, el modelo Enterprise Java Beans (EJB) de Sun, y el modelo .NET de Microsoft (Lau y Wang, 2007). También podemos agregar actualmente el modelo de componentes de WebAssembly (Wasm Component Model).<text:line-break/><text:tab/>Weinreich y Sametinger (2001) analizan los elementos básicos de un modelo ideal de componentes. Este diagrama muestra que los elementos de un modelo de componentes definen las interfaces de componentes, la información que necesita usar el componente en un programa y cómo debe implementarse un componente:</text:span></text:p>
      <text:list xml:id="list1599654527" text:style-name="WWNum4">
        <text:list-item>
          <text:p text:style-name="P47"><text:span text:style-name="T8">Interfaces:</text:span><text:span text:style-name="T4"> Los componentes se definen al especificar sus interfaces. El modelo de componentes especifica cómo deben definirse las interfaces y los elementos, tales como los nombres de operación, los parámetros y las excepciones que deben incluirse en la definición de la interfaz. El modelo también debe especificar el lenguaje usado para definir las interfaces de componentes. Algunos modelos de componentes requieren interfaces específicas que deben definirse por un componente. Se usan para componer el componente con la infraestructura de modelo de componentes, que ofrece servicios estandarizados, tales como seguridad y gestión de transacción.</text:span><draw:frame draw:style-name="fr1" draw:name="image3.png" text:anchor-type="char" svg:x="0.0709in" svg:y="0.2874in" svg:width="6.8728in" svg:height="3.2102in" draw:z-index="0"><draw:image xlink:href="Pictures/1000000000000270000001226712306F2B8058AC.png" xlink:type="simple" xlink:show="embed" xlink:actuate="onLoad" loext:mime-type="image/png"/></draw:frame></text:p>
        </text:list-item>
        <text:list-item>
          <text:p text:style-name="P47"><text:span text:style-name="T8">Información de Uso:</text:span><text:span text:style-name="T4"> Para que los componentes se distribuyan y se acceda a ellos de manera remota, deben tener un nombre único asociado. Éste debe ser totalmente único, por ejemplo, en EJB (Enterprise Java Beans) se genera un nombre jerárquico con la raíz basada en un nombre de dominio de Internet. Los servicios tienen un URI único (Uniform Resource Identifier, esto es, un identificador de recursos uniforme). Los metadatos de componente son datos acerca del componente en sí, tales como información acerca de sus interfaces y atributos. Los metadatos son importantes porque permiten a los usuarios del componente determinar qué servicios se proporcio nan y requieren. Las implementaciones de modelos de componentes por lo general incluyen formas específicas (tales como el uso de una interfaz de reflexión en Java) para acceder a los metadatos de este componente. Los componentes son entidades genéricas y, cuando se implementan, deben configurarse para ajustarse en un sistema de aplicación. Por ejemplo, se podría configurar el componente recolector de datos al definir el número máximo de sensores en un arreglo. </text:span></text:p>
        </text:list-item>
      </text:list>
      <text:p text:style-name="P7"><draw:frame draw:style-name="fr2" draw:name="image1.png" text:anchor-type="as-char" svg:width="6.1665in" svg:height="2.7709in" draw:z-index="0"><draw:image xlink:href="Pictures/10000000000002500000010A16E94A849BCC8DA6.png" xlink:type="simple" xlink:show="embed" xlink:actuate="onLoad" loext:mime-type="image/png"/></draw:frame></text:p>
      <text:p text:style-name="P48"><text:span text:style-name="T4">Por lo tanto, el modelo de componentes puede especificar cómo pueden personalizarse los componentes binarios para un entorno de implementación particular.</text:span></text:p>
      <text:list xml:id="list70409991562381" text:continue-numbering="true" text:style-name="WWNum4">
        <text:list-item>
          <text:p text:style-name="P47"><text:span text:style-name="T8">Implementación:</text:span><text:span text:style-name="T4"> El modelo de componentes incluye una especificación de cómo deben empacarse los componentes para su implementación como entidades ejecutables independientes. Puesto que los componentes son entidades independientes, deben empacarse con todo el software de soporte que no proporcione la infraestructura de componente, o que no esté definido en una interfaz “requiere”. La información de implementación incluye información sobre el contenido de un paquete y su organización binaria. Inevitablemente, conforme surjan nuevos requerimientos, los componentes deberán cambiarse o sustituirse. Por consiguiente, el modelo de componentes puede incluir reglas que rigen cuándo y cómo se permite la sustitución de componentes. Finalmente, el modelo de componentes puede definir la documentación de componentes que deba producirse. Esto se usa para encontrar el componente y decidir si es adecuado.</text:span></text:p>
        </text:list-item>
      </text:list>
      <text:p text:style-name="P31"><text:span text:style-name="T4"><text:line-break/>Algunos ejemplos de modelos de componentes que han sido utilizados en industria de software con mayor impacto histórico son:</text:span></text:p>
      <text:list xml:id="list654097406" text:style-name="WWNum2">
        <text:list-item>
          <text:p text:style-name="P41"><text:span text:style-name="T8">El Modelo de Componentes CORBA (CCM - CORBA Component Model) </text:span><text:a xlink:type="simple" xlink:href="https://www.omg.org/corba/" text:style-name="ListLabel_20_55" text:visited-style-name="ListLabel_20_55"><text:span text:style-name="T17">https://www.omg.org/corba/</text:span></text:a><text:span text:style-name="T8"> </text:span><text:span text:style-name="T4"><text:s/>es una extensión del modelo de objetos distribuidos de CORBA. Define un marco estandarizado para implementar, configurar, desplegar y ensamblar componentes de software que funcionan en redes heterogéneas, independientemente del lenguaje de programación o sistema operativo. </text:span></text:p>
        </text:list-item>
      </text:list>
      <text:p text:style-name="P21"><text:soft-page-break/><text:span text:style-name="T4">A</text:span><text:span text:style-name="T8">rquitectura y Componentes Principales</text:span><text:span text:style-name="T4"> </text:span></text:p>
      <text:p text:style-name="P21"><text:span text:style-name="T4">El CCM transforma la programación de objetos distribuidos en un enfoque de ensamblaje de componentes (COTS - Components "Off-The-Shelf"). Su arquitectura se basa en las siguientes características:</text:span></text:p>
      <text:list xml:id="list70410733876736" text:continue-numbering="true" text:style-name="WWNum2">
        <text:list-item>
          <text:list>
            <text:list-item>
              <text:p text:style-name="P49"><text:span text:style-name="T9">Puertos de Interacción (Ports)</text:span><text:span text:style-name="T4">: Son los puntos de contacto del componente con el exterior, divididos en:</text:span></text:p>
              <text:list>
                <text:list-item>
                  <text:p text:style-name="P54"><text:span text:style-name="T4">Facets (Facetas): Interfaces que el componente ofrece al exterior (provee servicios).</text:span></text:p>
                </text:list-item>
                <text:list-item>
                  <text:p text:style-name="P54"><text:span text:style-name="T4">Receptacles (Receptáculos): Representan dependencias; son los puntos donde el componente requiere servicios de otros.</text:span></text:p>
                </text:list-item>
                <text:list-item>
                  <text:p text:style-name="P54"><text:span text:style-name="T4">Event Sinks: Canales de entrada para recibir eventos asíncronos.</text:span></text:p>
                </text:list-item>
                <text:list-item>
                  <text:p text:style-name="P54"><text:span text:style-name="T4">Event Sources: Canales de salida para emitir eventos a otros componentes.</text:span></text:p>
                </text:list-item>
              </text:list>
            </text:list-item>
            <text:list-item>
              <text:p text:style-name="P50"><text:span text:style-name="T9">Contenedor (Container)</text:span><text:span text:style-name="T4">: Entorno de ejecución que aloja al componente y gestiona servicios comunes de manera transparente (ej. transacciones, seguridad, persistencia).</text:span></text:p>
            </text:list-item>
            <text:list-item>
              <text:p text:style-name="P50"><text:span text:style-name="T9">Home</text:span><text:span text:style-name="T4">: Factorías de componentes. Es la entidad encargada de crear, destruir, buscar y gestionar el ciclo de vida de los componentes dentro del contenedor.</text:span></text:p>
            </text:list-item>
            <text:list-item>
              <text:p text:style-name="P50"><text:span text:style-name="T9">Despliegue e Implementación (Deployment)</text:span><text:span text:style-name="T4">: El CCM estandariza metadatos (a través de descriptores XML) que permiten a los administradores ensamblar aplicaciones complejas combinando componentes previamente construidos.</text:span></text:p>
            </text:list-item>
          </text:list>
        </text:list-item>
        <text:list-item>
          <text:p text:style-name="P43"><text:span text:style-name="T8">COM (Component Object Model) / DCOM (Microsoft):</text:span></text:p>
          <text:list>
            <text:list-item>
              <text:p text:style-name="P51"><text:span text:style-name="T8">Estado:</text:span><text:span text:style-name="T4"> Vigente y fundamental en la arquitectura de Windows (DirectX, OLE, Windows Runtime).</text:span></text:p>
            </text:list-item>
            <text:list-item>
              <text:p text:style-name="P51"><text:span text:style-name="T8">Funcionamiento:</text:span><text:span text:style-name="T4"> Resuelve el problema del ABI (Application Binary Interface) en C++ utilizando tablas de funciones virtuales (vtables) puras, las cuales son binariamente compatibles con estructuras de C. Exige el uso de interfaces puramente abstractas y un sistema de recuento de referencias (métodos </text:span><text:span text:style-name="T23">AddRef</text:span><text:span text:style-name="T4"> y </text:span><text:span text:style-name="T23">Release</text:span><text:span text:style-name="T4">) heredados de una interfaz base </text:span><text:span text:style-name="T23">IUnknown</text:span><text:span text:style-name="T4">.</text:span></text:p>
            </text:list-item>
            <text:list-item>
              <text:p text:style-name="P51"><text:span text:style-name="T8">Relevancia:</text:span><text:span text:style-name="T4"> Es el caso de estudio por excelencia sobre cómo construir componentes agnósticos del compilador en C/C++.</text:span></text:p>
            </text:list-item>
          </text:list>
        </text:list-item>
        <text:list-item>
          <text:p text:style-name="P43"><text:span text:style-name="T8">OSGi (Open Services Gateway initiative):</text:span></text:p>
          <text:list>
            <text:list-item>
              <text:p text:style-name="P51"><text:span text:style-name="T8">Estado:</text:span><text:span text:style-name="T4"> Muy utilizado en el ecosistema Java (ej. el IDE Eclipse, servidores de aplicaciones).</text:span></text:p>
            </text:list-item>
            <text:list-item>
              <text:p text:style-name="P51"><text:span text:style-name="T8">Funcionamiento:</text:span><text:span text:style-name="T4"> Proporciona un modelo dinámico para Java donde los componentes (llamados </text:span><text:span text:style-name="T5">bundles</text:span><text:span text:style-name="T4">) pueden ser instalados, iniciados, detenidos, actualizados y desinstalados sin reiniciar la máquina virtual. Gestiona estrictamente las dependencias y el control de versiones a nivel de paquetes.</text:span></text:p>
            </text:list-item>
          </text:list>
        </text:list-item>
        <text:list-item>
          <text:p text:style-name="P43"><text:span text:style-name="T8">WebAssembly (Wasm) Component Model:</text:span></text:p>
          <text:list>
            <text:list-item>
              <text:p text:style-name="P51"><text:span text:style-name="T8">Estado:</text:span><text:span text:style-name="T4"> En desarrollo activo (respaldado por la Bytecode Alliance y el W3C), emergiendo como el estándar moderno para componentes.</text:span></text:p>
            </text:list-item>
            <text:list-item>
              <text:p text:style-name="P52"><text:span text:style-name="T8">Funcionamiento:</text:span><text:span text:style-name="T4"> Permite que módulos escritos en diferentes lenguajes (C++, Rust, Go, Python) interactúen de forma segura y agnóstica a la arquitectura subyacente. Define tipos de datos compartidos de alto nivel (cadenas, registros) sin depender de la memoria lineal del módulo subyacente.</text:span></text:p>
            </text:list-item>
          </text:list>
        </text:list-item>
      </text:list>
      <text:p text:style-name="P8"/>
      <text:p text:style-name="P8"><text:soft-page-break/></text:p>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83"><text:bookmark text:name="_142tp2nw15rd"/><text:span text:style-name="T24">Un ejemplo didáctico para entender cómo crear una muestra de modelo de componentes desde cero en C++</text:span></text:p>
      <text:p text:style-name="P10"><text:a xlink:type="simple" xlink:href="https://github.com/gabrielinuz/cpp-component-model" text:style-name="ListLabel_20_55" text:visited-style-name="ListLabel_20_55"><text:span text:style-name="T17">https://github.com/gabrielinuz/cpp-component-model</text:span></text:a> </text:p>
      <text:p text:style-name="P10"/>
      <text:p text:style-name="P24"><text:span text:style-name="T4">Para construir un modelo de componentes multiplataforma y seguro en C++, la filosofía central debe ser </text:span><text:span text:style-name="T8">"El que reserva la memoria, la libera"</text:span><text:span text:style-name="T4"> (para evitar la corrupción del heap) y </text:span><text:span text:style-name="T8">"El contrato es puro"</text:span><text:span text:style-name="T4"> (para evitar problemas de </text:span><text:span text:style-name="T8">ABI</text:span><text:span text:style-name="T28"><text:note text:id="ftn1" text:note-class="footnote"><text:note-citation>1</text:note-citation><text:note-body><text:p text:style-name="P55"><text:span text:style-name="T26"/><text:span text:style-name="T29"> El término ABI (Application Binary Interface o Interfaz Binaria de Aplicación) define el contrato de bajo nivel entre dos módulos de software compilados o un componente y el sistema operativo. En el modelo de componentes, la ABI establece exactamente cómo interactúan a nivel de código máquina y de memoria. </text:span></text:p><text:p text:style-name="P11"/></text:note-body></text:note></text:span><text:span text:style-name="T4">).</text:span></text:p>
      <text:p text:style-name="P7"><text:span text:style-name="T21"><text:line-break/></text:span><text:span text:style-name="T4">Para lograr esto, aplicaremos los siguientes patrones modernos:</text:span></text:p>
      <text:list xml:id="list3144234080" text:style-name="WWNum3">
        <text:list-item>
          <text:p text:style-name="P45"><text:span text:style-name="T8">Interfaces Puras (ABI-Safe):</text:span><text:span text:style-name="T4"> Las clases solo tendrán funciones virtuales puras. No cruzaremos el límite del módulo con tipos complejos de la biblioteca estándar (</text:span><text:span text:style-name="T8">std::string</text:span><text:span text:style-name="T4">, </text:span><text:span text:style-name="T8">std::vector</text:span><text:span text:style-name="T4">), usaremos tipos primitivos </text:span><text:span text:style-name="T8">C-style</text:span><text:span text:style-name="T4">.</text:span></text:p>
        </text:list-item>
        <text:list-item>
          <text:p text:style-name="P44"><text:span text:style-name="T8">Fábricas C-Linkage (extern "C"):</text:span><text:span text:style-name="T4"> Cada módulo exportará una función para crear la instancia y otra para destruirla.</text:span></text:p>
        </text:list-item>
        <text:list-item>
          <text:p text:style-name="P44"><text:span text:style-name="T8">RAII</text:span><text:span text:style-name="T28"><text:note text:id="ftn2" text:note-class="footnote"><text:note-citation>2</text:note-citation><text:note-body><text:p text:style-name="P56"><text:span text:style-name="T26"/><text:span text:style-name="T29"> RAII (por sus siglas en inglés: Resource Acquisition Is Initialization o "la adquisición de recursos es la inicialización") es un patrón de diseño fundamental en C++ y Rust creado por Bjarne Stroustrup. Garantiza que los recursos (memoria, archivos, sockets) se asignen durante la creación del objeto y se liberen automáticamente al salir de su ámbito, evitando fugas.</text:span></text:p></text:note-body></text:note></text:span><text:span text:style-name="T8"> para las Bibliotecas Dinámicas:</text:span><text:span text:style-name="T4"> Envolveremos los </text:span><text:span text:style-name="T5">handles</text:span><text:span text:style-name="T4"> del sistema operativo (</text:span><text:span text:style-name="T8">void*</text:span><text:span text:style-name="T4"> de </text:span><text:span text:style-name="T8">dlopen</text:span><text:span text:style-name="T4">) en una clase C++ que garantice su cierre.</text:span></text:p>
        </text:list-item>
        <text:list-item>
          <text:p text:style-name="P46"><text:soft-page-break/><text:span text:style-name="T8">Deleters Personalizados (La magia real):</text:span><text:span text:style-name="T4"> Usaremos </text:span><text:span text:style-name="T8">std::shared_ptr</text:span><text:span text:style-name="T4">, pero le inyectaremos un </text:span><text:span text:style-name="T5">custom deleter</text:span><text:span text:style-name="T4"> (eliminador personalizado). Este eliminador llamará a la función de destrucción de la biblioteca y, crucialmente, mantendrá vivo el </text:span><text:span text:style-name="T5">handle</text:span><text:span text:style-name="T4"> de la biblioteca hasta que el último componente que la use haya sido destruido.</text:span><text:span text:style-name="T21"><text:line-break/></text:span></text:p>
        </text:list-item>
      </text:list>
      <text:p text:style-name="P8"/>
      <text:p text:style-name="P87"><text:bookmark text:name="_8dorypuy5qtv"/>¿Por qué esta arquitectura es robusta?</text:p>
      <text:p text:style-name="Standard"/>
      <text:list xml:id="list847189757" text:style-name="WWNum1">
        <text:list-item>
          <text:p text:style-name="P42"><text:span text:style-name="T8">Fin del "Heap Corruption":</text:span><text:span text:style-name="T4"> No se debe usar </text:span><text:span text:style-name="T8">std::make_shared</text:span><text:span text:style-name="T4"> dentro del módulo. Cuando ese puntero expira en </text:span><text:span text:style-name="T23">main.cpp</text:span><text:span text:style-name="T4">, el binario principal intenta liberar memoria que no le pertenece. Con el </text:span><text:span text:style-name="T8">Deleter Personalizado</text:span><text:span text:style-name="T4"> (</text:span><text:span text:style-name="T8">[destroy_func](InterfaceType* ptr)</text:span><text:span text:style-name="T4">), el </text:span><text:span text:style-name="T8">main.cpp</text:span><text:span text:style-name="T4"> le ordena a la biblioteca compartida</text:span><text:span text:style-name="T27"><text:note text:id="ftn3" text:note-class="footnote"><text:note-citation>3</text:note-citation><text:note-body><text:p text:style-name="P57"><text:span text:style-name="T26"/><text:span text:style-name="T29"> Es un archivo de código compilado que varios programas pueden utilizar al mismo tiempo sin necesidad de duplicarlo en el equipo. Por ejemplo, en Linux se conocen como archivos .so y en Windows como .dll.</text:span></text:p></text:note-body></text:note></text:span><text:span text:style-name="T4"> (shared library): </text:span><text:span text:style-name="T5">"Tú creaste este puntero, libéralo tú"</text:span><text:span text:style-name="T4">.</text:span></text:p>
        </text:list-item>
      </text:list>
      <text:p text:style-name="P58"/>
      <text:list xml:id="list70410884000136" text:continue-numbering="true" text:style-name="WWNum1">
        <text:list-item>
          <text:p text:style-name="P42"><text:span text:style-name="T8">Protección contra la Descarga Prematura (Dangling Libraries):</text:span><text:span text:style-name="T4"> Al capturar la variable </text:span><text:span text:style-name="T8">lib</text:span><text:span text:style-name="T4"> (que es el </text:span><text:span text:style-name="T8">std::shared_ptr&lt;SharedLibrary&gt;</text:span><text:span text:style-name="T4">) dentro de la lambda del deleter, obligas a C++ a incrementar el contador de referencias de la biblioteca completa. Es físicamente imposible que la biblioteca se cierre (ejecute </text:span><text:span text:style-name="T8">dlclose</text:span><text:span text:style-name="T4">) mientras exista al menos un componente utilizándola, eliminando los </text:span><text:span text:style-name="T6">segfaults</text:span><text:span text:style-name="T4"> por acceder a memoria de un módulo descargado.</text:span></text:p>
        </text:list-item>
      </text:list>
      <text:p text:style-name="P59"/>
      <text:list xml:id="list70410932134860" text:continue-numbering="true" text:style-name="WWNum1">
        <text:list-item>
          <text:p text:style-name="P42"><text:span text:style-name="T8">Mayor robustez con ABI:</text:span><text:span text:style-name="T4"> Al cambiar </text:span><text:span text:style-name="T8">std::string</text:span><text:span text:style-name="T4"> en la firma de las funciones por </text:span><text:span text:style-name="T8">const char*</text:span><text:span text:style-name="T4"> y buffers mutables, se consigue mayor robustez ante el </text:span><text:span text:style-name="T6">name mangling</text:span><text:span text:style-name="T4"> y a las diferencias entre versiones de la Standard Template Library. Un componente compilado hoy funcionará en un ejecutable compilado dentro de 10 años.</text:span></text:p>
        </text:list-item>
      </text:list>
      <text:p text:style-name="P58"/>
      <text:list xml:id="list70409709138660" text:continue-numbering="true" text:style-name="WWNum1">
        <text:list-item>
          <text:p text:style-name="P42"><text:span text:style-name="T8">Seguridad de Hilos y Concurrencia Primitiva:</text:span><text:span text:style-name="T4"> </text:span><text:span text:style-name="T30">El mapa interno de bibliotecas cargadas (</text:span><text:span text:style-name="T8">loaded_libraries</text:span><text:span text:style-name="T30">) dentro del </text:span><text:span text:style-name="T8">ModuleManager</text:span><text:span text:style-name="T30"> se encuentra protegido de accesos concurrentes asíncronos mediante exclusión mutua con </text:span><text:span text:style-name="T37">std::mutex</text:span><text:span text:style-name="T30"> y bloqueos estructurados de tipo </text:span><text:span text:style-name="T8">std::lock_guard</text:span><text:span text:style-name="T30">. Esto garantiza la estabilidad del sistema si múltiples hilos del Host intentan instanciar o cargar componentes de forma simultánea.</text:span></text:p>
        </text:list-item>
      </text:list>
      <text:p text:style-name="P61"/>
      <text:list xml:id="list70410649044336" text:continue-numbering="true" text:style-name="WWNum1">
        <text:list-item>
          <text:p text:style-name="P42"><text:span text:style-name="T32">Rechazo a std::exit en Infraestructura (Propagación vía Excepciones):</text:span><text:span text:style-name="T30"> Se rechazó el uso de cortes abruptos mediante </text:span><text:span text:style-name="T32">std::exit(EXIT_FAILURE)</text:span><text:span text:style-name="T30"> dentro del mánager de módulos. Invocar </text:span><text:span text:style-name="T32">std::exit</text:span><text:span text:style-name="T30"> aborta el programa omitiendo el desenredo de la pila (</text:span><text:span text:style-name="T34">stack unwinding</text:span><text:span text:style-name="T30">), impidiendo la ejecución de destructores locales activos y dejando descriptores o recursos abiertos. En su lugar, los fallos de infraestructura se elevan limpiamente al Host mediante </text:span><text:span text:style-name="T32">std::runtime_error</text:span><text:span text:style-name="T30">, permitiendo una finalización ordenada y segura.</text:span></text:p>
        </text:list-item>
      </text:list>
      <text:p text:style-name="P58"/>
      <text:list xml:id="list70410553744867" text:continue-numbering="true" text:style-name="WWNum1">
        <text:list-item>
          <text:p text:style-name="P42"><text:span text:style-name="T8">Control de Versiones Estricto:</text:span><text:span text:style-name="T4"> Si se compila el Host con una versión de </text:span><text:span text:style-name="T8">IComponent</text:span><text:span text:style-name="T4"> que tiene 4 métodos, y cargas una biblioteca compartida (.dll o .so) compilada con una versión antigua que solo tiene 3 métodos, el Host intentará leer una tabla de funciones virtuales (</text:span><text:span text:style-name="T8">vtable</text:span><text:span text:style-name="T4">) incorrecta, provocando una violación de segmento (</text:span><text:span text:style-name="T8">Segfault</text:span><text:span text:style-name="T4">). </text:span><text:span text:style-name="T6">Solución obligatoria para producción:</text:span><text:span text:style-name="T4"> El módulo exporta una función que devuelva su versión del </text:span><text:span text:style-name="T8">ABI</text:span><text:span text:style-name="T4"> (ej. </text:span><text:span text:style-name="T8">extern "C" int get_api_version()</text:span><text:span text:style-name="T4">) para que el Host la valide antes de instanciar nada.<text:line-break/></text:span></text:p>
        </text:list-item>
      </text:list>
      <text:p text:style-name="P60"/>
      <text:p text:style-name="P60"/>
      <text:p text:style-name="P60"/>
      <text:p text:style-name="P60"/>
      <text:p text:style-name="P86"><text:bookmark text:name="_d4rjxcfib62c"/>Implementación de con ejemplo de componente Saludador (Greeter) </text:p>
      <text:p text:style-name="P89"><text:bookmark text:name="_dij3zvudmkr8"/>i_c<text:span text:style-name="T39">omponent.hpp:</text:span><text:span text:style-name="T21"> </text:span></text:p>
      <text:p text:style-name="P10"><text:soft-page-break/><text:a xlink:type="simple" xlink:href="https://github.com/gabrielinuz/cpp-component-model/blob/main/include/i_component.hpp" text:style-name="ListLabel_20_56" text:visited-style-name="ListLabel_20_56"><text:span text:style-name="T18">https://github.com/gabrielinuz/cpp-component-model/blob/main/include/i_component.hpp</text:span></text:a><text:span text:style-name="T11"> </text:span></text:p>
      <text:p text:style-name="P26"><text:span text:style-name="T31">Define el contrato del ciclo de vida base del componente, la versión del ABI (</text:span><text:span text:style-name="T33">CURRENT_API_VERSION</text:span><text:span text:style-name="T31">) y los tipos de punteros a función de la C-API.</text:span></text:p>
      <text:p text:style-name="P62"><text:span text:style-name="T40">#ifndef</text:span><text:span text:style-name="T41"> </text:span><text:span text:style-name="T40">ICOMPONENT_HPP</text:span></text:p>
      <text:p text:style-name="P62"><text:span text:style-name="T40">#define</text:span><text:span text:style-name="T41"> </text:span><text:span text:style-name="T40">ICOMPONENT_HPP</text:span></text:p>
      <text:p text:style-name="P62"><text:span text:style-name="T43">enum</text:span><text:span text:style-name="T41"> </text:span><text:span text:style-name="T43">class</text:span><text:span text:style-name="T41"> ComponentResult </text:span><text:span text:style-name="T40">:</text:span><text:span text:style-name="T41"> </text:span><text:span text:style-name="T43">int</text:span></text:p>
      <text:p text:style-name="P62"><text:span text:style-name="T40">{</text:span></text:p>
      <text:p text:style-name="P62"><text:span text:style-name="T41"><text:s text:c="3"/></text:span><text:span text:style-name="T44">SUCCESS</text:span><text:span text:style-name="T41"> </text:span><text:span text:style-name="T43">=</text:span><text:span text:style-name="T41"> </text:span><text:span text:style-name="T45">0</text:span><text:span text:style-name="T40">,</text:span></text:p>
      <text:p text:style-name="P62"><text:span text:style-name="T41"><text:s text:c="3"/></text:span><text:span text:style-name="T44">ERROR_INVALID_ARGUMENT</text:span><text:span text:style-name="T41"> </text:span><text:span text:style-name="T43">=</text:span><text:span text:style-name="T41"> </text:span><text:span text:style-name="T45">1</text:span><text:span text:style-name="T40">,</text:span></text:p>
      <text:p text:style-name="P62"><text:span text:style-name="T41"><text:s text:c="3"/></text:span><text:span text:style-name="T44">ERROR_INTERNAL</text:span><text:span text:style-name="T41"> </text:span><text:span text:style-name="T43">=</text:span><text:span text:style-name="T41"> </text:span><text:span text:style-name="T45">2</text:span></text:p>
      <text:p text:style-name="P62"><text:span text:style-name="T40">};</text:span></text:p>
      <text:p text:style-name="P62"><text:span text:style-name="T43">constexpr</text:span><text:span text:style-name="T41"> </text:span><text:span text:style-name="T43">int</text:span><text:span text:style-name="T41"> CURRENT_API_VERSION </text:span><text:span text:style-name="T43">=</text:span><text:span text:style-name="T41"> </text:span><text:span text:style-name="T45">1</text:span><text:span text:style-name="T40">;</text:span></text:p>
      <text:p text:style-name="P62"><text:span text:style-name="T43">class</text:span><text:span text:style-name="T41"> IComponent</text:span></text:p>
      <text:p text:style-name="P62"><text:span text:style-name="T40">{</text:span></text:p>
      <text:p text:style-name="P62"><text:span text:style-name="T41"><text:s text:c="3"/></text:span><text:span text:style-name="T43">public</text:span><text:span text:style-name="T40">:</text:span></text:p>
      <text:p text:style-name="P62"><text:span text:style-name="T41"><text:s text:c="7"/></text:span><text:span text:style-name="T43">virtual</text:span><text:span text:style-name="T41"> </text:span><text:span text:style-name="T40">~IComponent()</text:span><text:span text:style-name="T41"> </text:span><text:span text:style-name="T43">noexcept</text:span><text:span text:style-name="T41"> </text:span><text:span text:style-name="T43">=</text:span><text:span text:style-name="T41"> </text:span><text:span text:style-name="T45">default</text:span><text:span text:style-name="T40">;</text:span></text:p>
      <text:p text:style-name="P62"><text:span text:style-name="T40">};</text:span></text:p>
      <text:p text:style-name="P63"/>
      <text:p text:style-name="P62"><text:span text:style-name="T43">extern</text:span><text:span text:style-name="T41"> </text:span><text:span text:style-name="T40">"</text:span><text:span text:style-name="T46">C</text:span><text:span text:style-name="T40">"</text:span></text:p>
      <text:p text:style-name="P62"><text:span text:style-name="T40">{</text:span></text:p>
      <text:p text:style-name="P62"><text:span text:style-name="T41"><text:s text:c="3"/></text:span><text:span text:style-name="T45">typedef</text:span><text:span text:style-name="T41"> </text:span><text:span text:style-name="T43">int</text:span><text:span text:style-name="T41"> </text:span><text:span text:style-name="T40">(*</text:span><text:span text:style-name="T44">get_api_version_func</text:span><text:span text:style-name="T40">)(</text:span><text:span text:style-name="T41">) noexcept;</text:span></text:p>
      <text:p text:style-name="P62"><text:span text:style-name="T41"><text:s text:c="3"/>typedef IComponent</text:span><text:span text:style-name="T43">*</text:span><text:span text:style-name="T41"> </text:span><text:span text:style-name="T40">(*</text:span><text:span text:style-name="T45">create_component_func</text:span><text:span text:style-name="T40">)(</text:span><text:span text:style-name="T41">) noexcept;</text:span></text:p>
      <text:p text:style-name="P62"><text:soft-page-break/><text:span text:style-name="T41"><text:s text:c="3"/>typedef </text:span><text:span text:style-name="T43">void</text:span><text:span text:style-name="T41"> </text:span><text:span text:style-name="T40">(*</text:span><text:span text:style-name="T45">destroy_component_func</text:span><text:span text:style-name="T40">)(</text:span><text:span text:style-name="T41">IComponent</text:span><text:span text:style-name="T43">*</text:span><text:span text:style-name="T41">) noexcept;</text:span></text:p>
      <text:p text:style-name="P62"><text:span text:style-name="T41">}</text:span></text:p>
      <text:p text:style-name="P62"><text:span text:style-name="T40">#endif</text:span><text:span text:style-name="T42"> // ICOMPONENT_HPP</text:span></text:p>
      <text:p text:style-name="P67"><text:span text:style-name="T4">Utilizamos un enum class (En C++, se utiliza para agrupar constantes lógicas de manera segura.) para códigos de estado de las operaciones a través del ABI. Al evitar excepciones, requerimos un mecanismo clásico de retorno de errores (tipo HRESULT en COM) para informar al Host sobre el estado:</text:span></text:p>
      <text:p text:style-name="P62"><text:span text:style-name="T43">enum</text:span><text:span text:style-name="T41"> </text:span><text:span text:style-name="T43">class</text:span><text:span text:style-name="T41"> ComponentResult </text:span><text:span text:style-name="T40">:</text:span><text:span text:style-name="T41"> </text:span><text:span text:style-name="T43">int</text:span></text:p>
      <text:p text:style-name="P62"><text:span text:style-name="T40">{</text:span></text:p>
      <text:p text:style-name="P62"><text:span text:style-name="T41"><text:s text:c="3"/></text:span><text:span text:style-name="T44">SUCCESS</text:span><text:span text:style-name="T41"> </text:span><text:span text:style-name="T43">=</text:span><text:span text:style-name="T41"> </text:span><text:span text:style-name="T45">0</text:span><text:span text:style-name="T40">,</text:span></text:p>
      <text:p text:style-name="P62"><text:span text:style-name="T41"><text:s text:c="3"/></text:span><text:span text:style-name="T44">ERROR_INVALID_ARGUMENT</text:span><text:span text:style-name="T41"> </text:span><text:span text:style-name="T43">=</text:span><text:span text:style-name="T41"> </text:span><text:span text:style-name="T45">1</text:span><text:span text:style-name="T40">,</text:span></text:p>
      <text:p text:style-name="P62"><text:span text:style-name="T41"><text:s text:c="3"/></text:span><text:span text:style-name="T44">ERROR_INTERNAL</text:span><text:span text:style-name="T41"> </text:span><text:span text:style-name="T43">=</text:span><text:span text:style-name="T41"> </text:span><text:span text:style-name="T45">2</text:span></text:p>
      <text:p text:style-name="P62"><text:span text:style-name="T40">};</text:span></text:p>
      <text:p text:style-name="P32"/>
      <text:p text:style-name="P67"><text:span text:style-name="T4">Versión actual del contrato ABI. Si se modifican las interfaces virtuales (agregando o quitando métodos), esta expresión constante DEBE incrementarse para evitar violaciones de segmento:</text:span></text:p>
      <text:p text:style-name="P62"><text:span text:style-name="T43">constexpr</text:span><text:span text:style-name="T41"> </text:span><text:span text:style-name="T43">int</text:span><text:span text:style-name="T41"> CURRENT_API_VERSION </text:span><text:span text:style-name="T43">=</text:span><text:span text:style-name="T41"> </text:span><text:span text:style-name="T45">1</text:span><text:span text:style-name="T40">;</text:span></text:p>
      <text:p text:style-name="P68"/>
      <text:p text:style-name="P70"><text:span text:style-name="T4">Interfaz base para todos los componentes, solo un Destructor virtual. El uso de 'noexcept' es obligatorio aquí. Evita que una excepción lanzada durante la destrucción intente cruzar el límite del módulo:</text:span></text:p>
      <text:p text:style-name="P62"><text:span text:style-name="T43">class</text:span><text:span text:style-name="T41"> IComponent</text:span></text:p>
      <text:p text:style-name="P62"><text:span text:style-name="T40">{</text:span></text:p>
      <text:p text:style-name="P62"><text:span text:style-name="T41"><text:s text:c="3"/></text:span><text:span text:style-name="T43">public</text:span><text:span text:style-name="T40">:</text:span></text:p>
      <text:p text:style-name="P62"><text:span text:style-name="T41"><text:s text:c="7"/></text:span><text:span text:style-name="T43">virtual</text:span><text:span text:style-name="T41"> </text:span><text:span text:style-name="T40">~IComponent()</text:span><text:span text:style-name="T41"> </text:span><text:span text:style-name="T43">noexcept</text:span><text:span text:style-name="T41"> </text:span><text:span text:style-name="T43">=</text:span><text:span text:style-name="T41"> </text:span><text:span text:style-name="T45">default</text:span><text:span text:style-name="T40">;</text:span></text:p>
      <text:p text:style-name="P62"><text:span text:style-name="T40">};</text:span></text:p>
      <text:p text:style-name="P33"/>
      <text:p text:style-name="P70"><text:soft-page-break/><text:span text:style-name="T4">Tipos de punteros a función exportados (C-API) esto permite portabilidad entre sistemas operativos y tipos de compiladores ya que los símbolos en C permanecen constantes a diferencia de C++. Todas las funciones que cruzan el límite de la biblioteca compartida están marcadas con 'noexcept' garantizando que el compilador aborte el programa internamente si ocurre un error no manejado, en lugar de corromper la pila del Host.</text:span></text:p>
      <text:p text:style-name="P62"><text:span text:style-name="T43">extern</text:span><text:span text:style-name="T41"> </text:span><text:span text:style-name="T40">"</text:span><text:span text:style-name="T46">C</text:span><text:span text:style-name="T40">"</text:span></text:p>
      <text:p text:style-name="P62"><text:span text:style-name="T40">{</text:span></text:p>
      <text:p text:style-name="P62"><text:span text:style-name="T41"><text:s text:c="3"/></text:span><text:span text:style-name="T45">typedef</text:span><text:span text:style-name="T41"> </text:span><text:span text:style-name="T43">int</text:span><text:span text:style-name="T41"> </text:span><text:span text:style-name="T40">(*</text:span><text:span text:style-name="T44">get_api_version_func</text:span><text:span text:style-name="T40">)(</text:span><text:span text:style-name="T41">) noexcept;</text:span></text:p>
      <text:p text:style-name="P62"><text:span text:style-name="T41"><text:s text:c="3"/>typedef IComponent</text:span><text:span text:style-name="T43">*</text:span><text:span text:style-name="T41"> </text:span><text:span text:style-name="T40">(*</text:span><text:span text:style-name="T45">create_component_func</text:span><text:span text:style-name="T40">)(</text:span><text:span text:style-name="T41">) noexcept;</text:span></text:p>
      <text:p text:style-name="P62"><text:span text:style-name="T41"><text:s text:c="3"/>typedef </text:span><text:span text:style-name="T43">void</text:span><text:span text:style-name="T41"> </text:span><text:span text:style-name="T40">(*</text:span><text:span text:style-name="T45">destroy_component_func</text:span><text:span text:style-name="T40">)(</text:span><text:span text:style-name="T41">IComponent</text:span><text:span text:style-name="T43">*</text:span><text:span text:style-name="T41">) noexcept;</text:span></text:p>
      <text:p text:style-name="P62"><text:span text:style-name="T41">}</text:span></text:p>
      <text:p text:style-name="P68"/>
      <text:p text:style-name="P89"><text:bookmark text:name="_1m5mlpumuy40"/>i_greeter.hpp<text:span text:style-name="T39">:</text:span><text:span text:style-name="T21"> </text:span></text:p>
      <text:p text:style-name="P65"><text:span text:style-name="T31">Interfaz específica para el componente Saludador:</text:span></text:p>
      <text:p text:style-name="P71"><text:span text:style-name="T40">#ifndef</text:span><text:span text:style-name="T41"> </text:span><text:span text:style-name="T40">IGREETER_HPP</text:span></text:p>
      <text:p text:style-name="P71"><text:span text:style-name="T40">#define</text:span><text:span text:style-name="T41"> </text:span><text:span text:style-name="T40">IGREETER_HPP</text:span></text:p>
      <text:p text:style-name="P71"><text:span text:style-name="T40">#include</text:span><text:span text:style-name="T41"> </text:span><text:span text:style-name="T40">"</text:span><text:span text:style-name="T46">IComponent.hpp</text:span><text:span text:style-name="T40">"</text:span></text:p>
      <text:p text:style-name="P71"><text:span text:style-name="T40">#include</text:span><text:span text:style-name="T41"> </text:span><text:span text:style-name="T40">&lt;</text:span><text:span text:style-name="T46">cstddef</text:span><text:span text:style-name="T40">&gt;</text:span></text:p>
      <text:p text:style-name="P71"><text:span text:style-name="T43">class</text:span><text:span text:style-name="T41"> IGreeter </text:span><text:span text:style-name="T40">:</text:span><text:span text:style-name="T41"> </text:span><text:span text:style-name="T43">public</text:span><text:span text:style-name="T41"> IComponent</text:span></text:p>
      <text:p text:style-name="P71"><text:span text:style-name="T40">{</text:span></text:p>
      <text:p text:style-name="P71"><text:span text:style-name="T41"><text:s text:c="3"/></text:span><text:span text:style-name="T43">public</text:span><text:span text:style-name="T40">:</text:span></text:p>
      <text:p text:style-name="P71"><text:span text:style-name="T41"><text:s/><text:tab/> <text:s text:c="5"/></text:span><text:span text:style-name="T43">virtual</text:span><text:span text:style-name="T41"> ComponentResult </text:span><text:span text:style-name="T40">greet(</text:span><text:span text:style-name="T43">const</text:span><text:span text:style-name="T41"> </text:span><text:span text:style-name="T43">char*</text:span><text:span text:style-name="T41"> </text:span><text:span text:style-name="T45">name</text:span><text:span text:style-name="T40">,</text:span><text:span text:style-name="T41"> </text:span><text:span text:style-name="T43">char*</text:span><text:span text:style-name="T41"> </text:span><text:span text:style-name="T45">out_buffer</text:span><text:span text:style-name="T40">,</text:span><text:span text:style-name="T41"> <text:s text:c="2"/></text:span></text:p>
      <text:p text:style-name="P72"><text:span text:style-name="T43"><text:s text:c="38"/>size_t </text:span><text:span text:style-name="T45">buffer_size</text:span><text:span text:style-name="T40">)</text:span><text:span text:style-name="T41"> </text:span><text:span text:style-name="T43">noexcept</text:span><text:span text:style-name="T41"> </text:span><text:span text:style-name="T43">=</text:span><text:span text:style-name="T41"> </text:span><text:span text:style-name="T45">0</text:span><text:span text:style-name="T40">;</text:span></text:p>
      <text:p text:style-name="P71"><text:span text:style-name="T40">};</text:span></text:p>
      <text:p text:style-name="P71"><text:span text:style-name="T40">#endif</text:span><text:span text:style-name="T42"> // IGREETER_HPP</text:span></text:p>
      <text:p text:style-name="P34"><text:soft-page-break/></text:p>
      <text:p text:style-name="P89"><text:bookmark text:name="_fjuhmwhgjplf"/>shared_library.hpp<text:span text:style-name="T39">:</text:span><text:span text:style-name="T21"> </text:span></text:p>
      <text:p text:style-name="P26"><text:span text:style-name="T31">Clase RAII para gestionar el ciclo de vida de una biblioteca compartida:</text:span><text:a xlink:type="simple" xlink:href="https://github.com/gabrielinuz/cpp-component-model/blob/main/include/shared_library.hpp" text:style-name="ListLabel_20_55" text:visited-style-name="ListLabel_20_55"><text:span text:style-name="T17">https://github.com/gabrielinuz/cpp-component-model/blob/main/include/shared_library.hpp</text:span></text:a><text:span text:style-name="T33"> </text:span></text:p>
      <text:p text:style-name="P36"><text:span text:style-name="T33"><text:tab/></text:span><text:span text:style-name="T31">Con directivas del preprocesador se fuerza para compilar condicionalmente código específicamente para cada sistemas operativos, esto permite detectar la plataforma y cargar la biblioteca adecuada:</text:span></text:p>
      <text:p text:style-name="P73"><text:span text:style-name="T40">#ifdef</text:span><text:span text:style-name="T41"> </text:span><text:span text:style-name="T40">__unix__</text:span></text:p>
      <text:p text:style-name="P73"><text:span text:style-name="T41"><text:s text:c="3"/></text:span><text:span text:style-name="T40">#include</text:span><text:span text:style-name="T41"> </text:span><text:span text:style-name="T40">&lt;</text:span><text:span text:style-name="T46">dlfcn.h</text:span><text:span text:style-name="T40">&gt;</text:span></text:p>
      <text:p text:style-name="P73"><text:span text:style-name="T41"><text:s text:c="3"/></text:span><text:span text:style-name="T43">const</text:span><text:span text:style-name="T41"> std</text:span><text:span text:style-name="T40">::</text:span><text:span text:style-name="T41">string LIB_EXTENSION </text:span><text:span text:style-name="T43">=</text:span><text:span text:style-name="T41"> </text:span><text:span text:style-name="T40">"</text:span><text:span text:style-name="T46">.so</text:span><text:span text:style-name="T40">";</text:span></text:p>
      <text:p text:style-name="P73"><text:span text:style-name="T40">#elif</text:span><text:span text:style-name="T41"> </text:span><text:span text:style-name="T40">defined(</text:span><text:span text:style-name="T41">_WIN32</text:span><text:span text:style-name="T40">)</text:span><text:span text:style-name="T41"> </text:span><text:span text:style-name="T43">||</text:span><text:span text:style-name="T41"> </text:span><text:span text:style-name="T40">defined(</text:span><text:span text:style-name="T41">WIN32</text:span><text:span text:style-name="T40">)</text:span></text:p>
      <text:p text:style-name="P73"><text:span text:style-name="T41"><text:s text:c="3"/></text:span><text:span text:style-name="T40">#include</text:span><text:span text:style-name="T41"> </text:span><text:span text:style-name="T40">&lt;</text:span><text:span text:style-name="T46">windows.h</text:span><text:span text:style-name="T40">&gt;</text:span></text:p>
      <text:p text:style-name="P73"><text:span text:style-name="T41"><text:s text:c="3"/></text:span><text:span text:style-name="T43">const</text:span><text:span text:style-name="T41"> std</text:span><text:span text:style-name="T40">::</text:span><text:span text:style-name="T41">string LIB_EXTENSION </text:span><text:span text:style-name="T43">=</text:span><text:span text:style-name="T41"> </text:span><text:span text:style-name="T40">"</text:span><text:span text:style-name="T46">.dll</text:span><text:span text:style-name="T40">";</text:span></text:p>
      <text:p text:style-name="P73"><text:span text:style-name="T40">#elif</text:span><text:span text:style-name="T41"> __APPLE__</text:span></text:p>
      <text:p text:style-name="P73"><text:span text:style-name="T41"><text:s text:c="3"/></text:span><text:span text:style-name="T40">#include</text:span><text:span text:style-name="T41"> </text:span><text:span text:style-name="T40">&lt;</text:span><text:span text:style-name="T46">dlfcn.h</text:span><text:span text:style-name="T40">&gt;</text:span></text:p>
      <text:p text:style-name="P73"><text:span text:style-name="T41"><text:s text:c="3"/></text:span><text:span text:style-name="T43">const</text:span><text:span text:style-name="T41"> std</text:span><text:span text:style-name="T40">::</text:span><text:span text:style-name="T41">string LIB_EXTENSION </text:span><text:span text:style-name="T43">=</text:span><text:span text:style-name="T41"> </text:span><text:span text:style-name="T40">"</text:span><text:span text:style-name="T46">.dylib</text:span><text:span text:style-name="T40">";</text:span></text:p>
      <text:p text:style-name="P73"><text:span text:style-name="T40">#else</text:span></text:p>
      <text:p text:style-name="P73"><text:span text:style-name="T41"><text:s text:c="3"/></text:span><text:span text:style-name="T40">#error</text:span><text:span text:style-name="T41"> </text:span><text:span text:style-name="T40">"</text:span><text:span text:style-name="T46">Plataforma no soportada</text:span><text:span text:style-name="T40">"</text:span></text:p>
      <text:p text:style-name="P73"><text:span text:style-name="T40">#endif</text:span></text:p>
      <text:p text:style-name="P35"/>
      <text:p text:style-name="P37"><text:span text:style-name="T31">Clase RAII para gestionar el ciclo de vida de una biblioteca compartida:</text:span></text:p>
      <text:p text:style-name="P73"><text:span text:style-name="T43">class</text:span><text:span text:style-name="T41"> SharedLibrary</text:span></text:p>
      <text:p text:style-name="P73"><text:span text:style-name="T40">{</text:span></text:p>
      <text:p text:style-name="P73"><text:span text:style-name="T41"><text:s text:c="3"/></text:span><text:span text:style-name="T43">private</text:span><text:span text:style-name="T40">:</text:span></text:p>
      <text:p text:style-name="P73"><text:soft-page-break/><text:span text:style-name="T41"><text:s text:c="7"/></text:span><text:span text:style-name="T43">void*</text:span><text:span text:style-name="T41"> handle</text:span><text:span text:style-name="T40">;</text:span><text:span text:style-name="T41"> </text:span></text:p>
      <text:p text:style-name="P75"><text:span text:style-name="T41"><text:s/>std</text:span><text:span text:style-name="T40">::</text:span><text:span text:style-name="T41">string path</text:span><text:span text:style-name="T40">;</text:span></text:p>
      <text:p text:style-name="P24"><text:span text:style-name="T4">Constructor que intenta cargar la biblioteca, el parámetro </text:span><text:span text:style-name="T8">libPath</text:span><text:span text:style-name="T4"> es Ruta de la biblioteca (sin la extensión del SO). Se lanza un </text:span><text:span text:style-name="T8">std::runtime_error </text:span><text:span text:style-name="T4">Si la biblioteca no se puede cargar. En C++, La palabra reservada </text:span><text:span text:style-name="T8">explicit</text:span><text:span text:style-name="T4"> impide que el compilador utilice un constructor para conversiones de tipo implícitas.Obliga al código del desarrollador a inicializar los objetos intencionalmente mediante inicialización directa o conversión explícita.</text:span></text:p>
      <text:p text:style-name="Standard"/>
      <text:p text:style-name="P73"><text:span text:style-name="T41"><text:s text:c="3"/></text:span><text:span text:style-name="T43">public</text:span><text:span text:style-name="T40">:</text:span></text:p>
      <text:p text:style-name="P73"><text:span text:style-name="T41"><text:s text:c="7"/></text:span><text:span text:style-name="T43">explicit</text:span><text:span text:style-name="T41"> </text:span><text:span text:style-name="T40">SharedLibrary(</text:span><text:span text:style-name="T43">const</text:span><text:span text:style-name="T41"> std</text:span><text:span text:style-name="T40">::</text:span><text:span text:style-name="T41">string</text:span><text:span text:style-name="T43">&amp;</text:span><text:span text:style-name="T41"> </text:span><text:span text:style-name="T45">libPath</text:span><text:span text:style-name="T40">)</text:span><text:span text:style-name="T41"> </text:span><text:span text:style-name="T40">:</text:span><text:span text:style-name="T41"> </text:span><text:span text:style-name="T40">path(</text:span><text:span text:style-name="T41">libPath </text:span><text:span text:style-name="T43">+</text:span><text:span text:style-name="T41"> </text:span></text:p>
      <text:p text:style-name="P73"><text:span text:style-name="T41"><text:s text:c="69"/>LIB_EXTENSION</text:span><text:span text:style-name="T40">)</text:span></text:p>
      <text:p text:style-name="P73"><text:span text:style-name="T41"><text:s text:c="7"/></text:span><text:span text:style-name="T40">{</text:span></text:p>
      <text:p text:style-name="P73"><text:span text:style-name="T41"><text:s text:c="11"/></text:span><text:span text:style-name="T40">#ifdef</text:span><text:span text:style-name="T41"> _WIN32</text:span></text:p>
      <text:p text:style-name="P73"><text:span text:style-name="T41"><text:s text:c="15"/>handle </text:span><text:span text:style-name="T43">=</text:span><text:span text:style-name="T41"> </text:span><text:span text:style-name="T40">LoadLibrary(</text:span><text:span text:style-name="T44">path</text:span><text:span text:style-name="T40">.c_str());</text:span></text:p>
      <text:p text:style-name="P73"><text:span text:style-name="T40"><text:s text:c="11"/>#else</text:span></text:p>
      <text:p text:style-name="P73"><text:span text:style-name="T41"><text:s text:c="15"/>handle </text:span><text:span text:style-name="T43">=</text:span><text:span text:style-name="T41"> </text:span><text:span text:style-name="T40">dlopen(</text:span><text:span text:style-name="T44">path</text:span><text:span text:style-name="T40">.c_str(),</text:span><text:span text:style-name="T41"> RTLD_NOW </text:span><text:span text:style-name="T43">|</text:span><text:span text:style-name="T41"> RTLD_LOCAL</text:span><text:span text:style-name="T40">);</text:span></text:p>
      <text:p text:style-name="P73"><text:span text:style-name="T40"><text:s text:c="11"/>#endif</text:span></text:p>
      <text:p text:style-name="P73"><text:span text:style-name="T41"><text:s text:c="15"/></text:span><text:span text:style-name="T40">if</text:span><text:span text:style-name="T41"> </text:span><text:span text:style-name="T40">(</text:span><text:span text:style-name="T43">!</text:span><text:span text:style-name="T41">handle</text:span><text:span text:style-name="T40">)</text:span></text:p>
      <text:p text:style-name="P73"><text:span text:style-name="T41"><text:s text:c="15"/></text:span><text:span text:style-name="T40">{</text:span></text:p>
      <text:p text:style-name="P73"><text:span text:style-name="T41"><text:s text:c="19"/></text:span><text:span text:style-name="T40">throw</text:span><text:span text:style-name="T41"> std</text:span><text:span text:style-name="T40">::runtime_error("</text:span><text:span text:style-name="T46">Error al cargar la biblioteca:</text:span></text:p>
      <text:p text:style-name="P75"><text:span text:style-name="T46"><text:s/><text:tab/><text:tab/><text:tab/><text:tab/><text:tab/><text:tab/><text:tab/></text:span><text:span text:style-name="T40">"</text:span><text:span text:style-name="T41"> </text:span><text:span text:style-name="T43">+</text:span><text:span text:style-name="T41"> path</text:span><text:span text:style-name="T40">);</text:span></text:p>
      <text:p text:style-name="P73"><text:span text:style-name="T41"><text:s text:c="15"/></text:span><text:span text:style-name="T40">}</text:span></text:p>
      <text:p text:style-name="P73"><text:span text:style-name="T41"><text:s text:c="7"/></text:span><text:span text:style-name="T40">}</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24"><text:span text:style-name="T4">Destructor que libera la biblioteca de la memoria, utilizando directivas del preprocesador para hacerlo adecuadamente en el sistema operativo donde se compila.</text:span></text:p>
      <text:p text:style-name="P74"/>
      <text:p text:style-name="P73"><text:span text:style-name="T41"><text:s text:c="7"/></text:span><text:span text:style-name="T40">~SharedLibrary()</text:span></text:p>
      <text:p text:style-name="P73"><text:span text:style-name="T41"><text:s text:c="7"/></text:span><text:span text:style-name="T40">{</text:span></text:p>
      <text:p text:style-name="P73"><text:span text:style-name="T41"><text:s text:c="11"/></text:span><text:span text:style-name="T40">if</text:span><text:span text:style-name="T41"> </text:span><text:span text:style-name="T40">(</text:span><text:span text:style-name="T41">handle</text:span><text:span text:style-name="T40">)</text:span></text:p>
      <text:p text:style-name="P73"><text:span text:style-name="T41"><text:s text:c="11"/></text:span><text:span text:style-name="T40">{</text:span></text:p>
      <text:p text:style-name="P73"><text:span text:style-name="T41"><text:s text:c="15"/></text:span><text:span text:style-name="T40">#ifdef</text:span><text:span text:style-name="T41"> _WIN32</text:span></text:p>
      <text:p text:style-name="P73"><text:span text:style-name="T41"><text:s text:c="19"/></text:span><text:span text:style-name="T40">FreeLibrary((</text:span><text:span text:style-name="T41">HINSTANCE</text:span><text:span text:style-name="T40">)</text:span><text:span text:style-name="T41">handle</text:span><text:span text:style-name="T40">);</text:span></text:p>
      <text:p text:style-name="P73"><text:span text:style-name="T40"><text:s text:c="15"/>#else</text:span></text:p>
      <text:p text:style-name="P73"><text:span text:style-name="T41"><text:s text:c="19"/></text:span><text:span text:style-name="T40">dlclose(</text:span><text:span text:style-name="T41">handle</text:span><text:span text:style-name="T40">);</text:span></text:p>
      <text:p text:style-name="P73"><text:span text:style-name="T40"><text:s text:c="15"/>#endif</text:span></text:p>
      <text:p text:style-name="P73"><text:span text:style-name="T41"><text:s text:c="11"/></text:span><text:span text:style-name="T40">}</text:span></text:p>
      <text:p text:style-name="P73"><text:soft-page-break/><text:span text:style-name="T41"><text:s text:c="7"/></text:span><text:span text:style-name="T40">}</text:span></text:p>
      <text:p text:style-name="P1"/>
      <text:p text:style-name="P25"><text:span text:style-name="T4">Prevenimos la copia para evitar cerrar el handle accidentalmente agregando una línea </text:span><text:span text:style-name="T8">= delete;</text:span><text:span text:style-name="T4"> a la declaración de un constructor. Esto indica al compilador que desactive dicho constructor, impidiendo que los objetos se creen o copien de esa manera específica:</text:span></text:p>
      <text:p text:style-name="P1"/>
      <text:p text:style-name="P74"/>
      <text:p text:style-name="P73"><text:span text:style-name="T41"><text:s text:c="7"/></text:span><text:span text:style-name="T40">SharedLibrary(</text:span><text:span text:style-name="T43">const</text:span><text:span text:style-name="T41"> SharedLibrary</text:span><text:span text:style-name="T43">&amp;</text:span><text:span text:style-name="T40">)</text:span><text:span text:style-name="T41"> </text:span><text:span text:style-name="T43">=</text:span><text:span text:style-name="T41"> </text:span><text:span text:style-name="T43">delete</text:span><text:span text:style-name="T40">;</text:span></text:p>
      <text:p text:style-name="P73"><text:span text:style-name="T41"><text:s text:c="7"/>SharedLibrary</text:span><text:span text:style-name="T43">&amp;</text:span><text:span text:style-name="T41"> </text:span><text:span text:style-name="T45">operator</text:span><text:span text:style-name="T41">=</text:span><text:span text:style-name="T40">(</text:span><text:span text:style-name="T43">const</text:span><text:span text:style-name="T41"> SharedLibrary</text:span><text:span text:style-name="T43">&amp;</text:span><text:span text:style-name="T40">)</text:span><text:span text:style-name="T41"> </text:span><text:span text:style-name="T43">=</text:span><text:span text:style-name="T41"> </text:span><text:span text:style-name="T43">delete</text:span><text:span text:style-name="T40">;</text:span></text:p>
      <text:p text:style-name="Standard"/>
      <text:p text:style-name="P22"/>
      <text:p text:style-name="P22"/>
      <text:p text:style-name="P22"/>
      <text:p text:style-name="P22"/>
      <text:p text:style-name="P22"/>
      <text:p text:style-name="P22"/>
      <text:p text:style-name="P24"><text:span text:style-name="T4">El método </text:span><text:span text:style-name="T8">get_symbol</text:span><text:span text:style-name="T4"> obtiene un símbolo (función) exportado por la biblioteca. El parámetro </text:span><text:span text:style-name="T8">symbolName</text:span><text:span text:style-name="T4"> es el nombre de la función exportada. Este método retorna un puntero a la función, o nullptr si no se encuentra.</text:span></text:p>
      <text:p text:style-name="Standard"/>
      <text:p text:style-name="P74"/>
      <text:p text:style-name="P73"><text:span text:style-name="T41"><text:s text:c="7"/></text:span><text:span text:style-name="T43">void*</text:span><text:span text:style-name="T41"> </text:span><text:span text:style-name="T40">get_symbol(</text:span><text:span text:style-name="T43">const</text:span><text:span text:style-name="T41"> std</text:span><text:span text:style-name="T40">::</text:span><text:span text:style-name="T41">string</text:span><text:span text:style-name="T43">&amp;</text:span><text:span text:style-name="T41"> </text:span><text:span text:style-name="T45">symbolName</text:span><text:span text:style-name="T40">)</text:span></text:p>
      <text:p text:style-name="P73"><text:span text:style-name="T41"><text:s text:c="7"/></text:span><text:span text:style-name="T40">{</text:span></text:p>
      <text:p text:style-name="P73"><text:span text:style-name="T41"><text:s text:c="11"/></text:span><text:span text:style-name="T40">#ifdef</text:span><text:span text:style-name="T41"> _WIN32</text:span></text:p>
      <text:p text:style-name="P73"><text:span text:style-name="T41"><text:s text:c="15"/></text:span><text:span text:style-name="T40">return</text:span><text:span text:style-name="T41"> </text:span><text:span text:style-name="T40">(</text:span><text:span text:style-name="T43">void*</text:span><text:span text:style-name="T40">)GetProcAddress((</text:span><text:span text:style-name="T41">HINSTANCE</text:span><text:span text:style-name="T40">)</text:span><text:span text:style-name="T41">handle</text:span><text:span text:style-name="T40">,</text:span></text:p>
      <text:p text:style-name="P73"><text:soft-page-break/><text:span text:style-name="T41"><text:s/><text:tab/><text:tab/><text:tab/><text:tab/><text:tab/><text:tab/><text:tab/><text:tab/></text:span><text:span text:style-name="T47">symbolName</text:span><text:span text:style-name="T40">.c_str());</text:span></text:p>
      <text:p text:style-name="P73"><text:span text:style-name="T40"><text:s text:c="11"/>#else</text:span></text:p>
      <text:p text:style-name="P73"><text:span text:style-name="T41"><text:s text:c="15"/></text:span><text:span text:style-name="T40">return</text:span><text:span text:style-name="T41"> </text:span><text:span text:style-name="T40">dlsym(</text:span><text:span text:style-name="T41">handle</text:span><text:span text:style-name="T40">,</text:span><text:span text:style-name="T41"> </text:span><text:span text:style-name="T47">symbolName</text:span><text:span text:style-name="T40">.c_str());</text:span></text:p>
      <text:p text:style-name="P73"><text:span text:style-name="T40"><text:s text:c="11"/>#endif</text:span></text:p>
      <text:p text:style-name="P73"><text:span text:style-name="T41"><text:s text:c="7"/></text:span><text:span text:style-name="T40">}</text:span></text:p>
      <text:p text:style-name="P73"><text:span text:style-name="T41">}</text:span><text:span text:style-name="T40">;</text:span></text:p>
      <text:p text:style-name="P73"><text:span text:style-name="T40">#endif</text:span><text:span text:style-name="T42"> // SHARED_LIBRARY_HPP</text:span></text:p>
      <text:p text:style-name="P35"/>
      <text:p text:style-name="Heading_20_3"><text:bookmark text:name="_om1a96d73yn6"/></text:p>
      <text:p text:style-name="Heading_20_3"><text:bookmark text:name="_u4ylrygv52cl"/>module_manager.hpp:</text:p>
      <text:p text:style-name="P10"><text:a xlink:type="simple" xlink:href="https://github.com/gabrielinuz/cpp-component-model/blob/main/include/module_manager.hpp" text:style-name="ListLabel_20_57" text:visited-style-name="ListLabel_20_57"><text:span text:style-name="T19">https://github.com/gabrielinuz/cpp-component-model/blob/main/include/module_manager.hpp </text:span></text:a></text:p>
      <text:p text:style-name="P10"><text:s/></text:p>
      <text:p text:style-name="P27"><text:span text:style-name="T31">Gestor central de módulos que resuelve la instanciación segura. Mantiene una frontera estricta de infraestructura. No incorpora lógica de negocio ni conoce los métodos específicos de las interfaces derivadas. Hace uso intensivo de shared_library.hpp. Y se usa un contenedor map (mapa) para guardar las distintas bibliotecas dinámicas que se carguen y se manipulen como módulos: </text:span></text:p>
      <text:p text:style-name="P76"><text:span text:style-name="T43">class</text:span><text:span text:style-name="T41"> ModuleManager</text:span><text:span text:style-name="T40">{</text:span></text:p>
      <text:p text:style-name="P76"><text:span text:style-name="T41"><text:s text:c="3"/></text:span><text:span text:style-name="T43">private</text:span><text:span text:style-name="T40">:</text:span></text:p>
      <text:p text:style-name="P76"><text:span text:style-name="T41"><text:s text:c="7"/>std</text:span><text:span text:style-name="T40">::</text:span><text:span text:style-name="T41">unordered_map</text:span><text:span text:style-name="T43">&lt;</text:span><text:span text:style-name="T41">std</text:span><text:span text:style-name="T40">::</text:span><text:span text:style-name="T41">string</text:span><text:span text:style-name="T40">,</text:span><text:span text:style-name="T41"> std</text:span><text:span text:style-name="T40">::</text:span><text:span text:style-name="T41">shared_ptr</text:span><text:span text:style-name="T43">&lt;</text:span><text:span text:style-name="T41">SharedLibrary</text:span><text:span text:style-name="T43">&gt;&gt;</text:span><text:span text:style-name="T41"> loaded_libraries</text:span><text:span text:style-name="T40">;</text:span></text:p>
      <text:p text:style-name="P27"><text:span text:style-name="T31"><text:line-break/><text:tab/>Hacemos uso de </text:span><text:span text:style-name="T33">mutex</text:span><text:span text:style-name="T31"> con </text:span><text:span text:style-name="T33">std::lock_guard.</text:span><text:span text:style-name="T31"> Un </text:span><text:span text:style-name="T33">mutex</text:span><text:span text:style-name="T31"> (exclusión mutua) en C++ es un mecanismo de sincronización que permite proteger recursos compartidos para evitar que múltiples hilos accedan a ellos al mismo tiempo. Garantiza que solo un hilo a la vez ejecute la sección crítica de código. En este caso lo utilizamos para proteger el acceso concurrente al mapa de bibliotecas.</text:span></text:p>
      <text:p text:style-name="P76"><text:span text:style-name="T41"><text:s/>std</text:span><text:span text:style-name="T40">::</text:span><text:span text:style-name="T41">mutex map_mutex</text:span><text:span text:style-name="T40">;</text:span></text:p>
      <text:p text:style-name="P77"/>
      <text:p text:style-name="P26"><text:span text:style-name="T31">El método privado </text:span><text:span text:style-name="T33">extract_module_name</text:span><text:span text:style-name="T31">, lo usamos para extraer el nombre de una biblioteca desde una ruta completa, por ejemplo: Extrae </text:span><text:span text:style-name="T33">"Greeter"</text:span><text:span text:style-name="T31"> a partir de </text:span><text:span text:style-name="T33">"./lib/Greeter"</text:span><text:span text:style-name="T31">.</text:span></text:p>
      <text:p text:style-name="P76"><text:span text:style-name="T41"><text:s text:c="7"/>std</text:span><text:span text:style-name="T40">::</text:span><text:span text:style-name="T41">string </text:span><text:span text:style-name="T40">extract_module_name(</text:span><text:span text:style-name="T43">const</text:span><text:span text:style-name="T41"> std</text:span><text:span text:style-name="T40">::</text:span><text:span text:style-name="T41">string</text:span><text:span text:style-name="T43">&amp;</text:span><text:span text:style-name="T41"> </text:span><text:span text:style-name="T45">path</text:span><text:span text:style-name="T40">)</text:span><text:span text:style-name="T41"> </text:span><text:span text:style-name="T43">const</text:span></text:p>
      <text:p text:style-name="P76"><text:soft-page-break/><text:span text:style-name="T41"><text:s text:c="7"/></text:span><text:span text:style-name="T40">{</text:span></text:p>
      <text:p text:style-name="P76"><text:span text:style-name="T41"><text:s text:c="11"/></text:span><text:span text:style-name="T43">size_t</text:span><text:span text:style-name="T41"> pos </text:span><text:span text:style-name="T43">=</text:span><text:span text:style-name="T41"> </text:span><text:span text:style-name="T44">path</text:span><text:span text:style-name="T40">.find_last_of("</text:span><text:span text:style-name="T46">/</text:span><text:span text:style-name="T48">\\</text:span><text:span text:style-name="T40">");</text:span></text:p>
      <text:p text:style-name="P76"><text:span text:style-name="T41"><text:s text:c="11"/></text:span><text:span text:style-name="T40">return</text:span><text:span text:style-name="T41"> </text:span><text:span text:style-name="T40">(</text:span><text:span text:style-name="T41">pos </text:span><text:span text:style-name="T43">==</text:span><text:span text:style-name="T41"> std</text:span><text:span text:style-name="T40">::</text:span><text:span text:style-name="T41">string</text:span><text:span text:style-name="T40">::</text:span><text:span text:style-name="T41">npos</text:span><text:span text:style-name="T40">)</text:span><text:span text:style-name="T41"> </text:span><text:span text:style-name="T43">?</text:span><text:span text:style-name="T41"> path </text:span><text:span text:style-name="T43">:</text:span><text:span text:style-name="T41"> </text:span><text:span text:style-name="T44">path</text:span><text:span text:style-name="T40">.substr(</text:span><text:span text:style-name="T41">pos </text:span><text:span text:style-name="T43">+</text:span><text:span text:style-name="T41"> </text:span><text:span text:style-name="T45">1</text:span><text:span text:style-name="T40">);</text:span></text:p>
      <text:p text:style-name="P76"><text:span text:style-name="T41"><text:s text:c="7"/></text:span><text:span text:style-name="T40">}</text:span></text:p>
      <text:p text:style-name="P77"/>
      <text:p text:style-name="P27"><text:span text:style-name="T31">El método público </text:span><text:span text:style-name="T33">load_module</text:span><text:span text:style-name="T31"> carga un módulo en memoria usando la ruta proporcionada. El parámetro </text:span><text:span text:style-name="T33">path</text:span><text:span text:style-name="T31"> es ruta real del archivo (sin extensión). Mediante el manejo de excepciones se lanza </text:span><text:span text:style-name="T33">std::runtime_error</text:span><text:span text:style-name="T31"> si el módulo no puede ser cargado, deteniendo la ejecución en cascada de dependencias mediante RAII.</text:span></text:p>
      <text:p text:style-name="P28"/>
      <text:p text:style-name="P28"/>
      <text:p text:style-name="P29"><text:span text:style-name="T41"><text:s text:c="7"/></text:span><text:span text:style-name="T43">void</text:span><text:span text:style-name="T41"> </text:span><text:span text:style-name="T40">load_module(</text:span><text:span text:style-name="T43">const</text:span><text:span text:style-name="T41"> std</text:span><text:span text:style-name="T40">::</text:span><text:span text:style-name="T41">string</text:span><text:span text:style-name="T43">&amp;</text:span><text:span text:style-name="T41"> </text:span><text:span text:style-name="T45">path</text:span><text:span text:style-name="T40">)</text:span></text:p>
      <text:p text:style-name="P29"><text:span text:style-name="T41"><text:s text:c="7"/></text:span><text:span text:style-name="T40">{</text:span></text:p>
      <text:p text:style-name="P29"><text:span text:style-name="T41"><text:s text:c="11"/>std</text:span><text:span text:style-name="T40">::</text:span><text:span text:style-name="T41">string module_name </text:span><text:span text:style-name="T43">=</text:span><text:span text:style-name="T41"> </text:span><text:span text:style-name="T40">extract_module_name(</text:span><text:span text:style-name="T41">path</text:span><text:span text:style-name="T40">);</text:span></text:p>
      <text:p text:style-name="P29"><text:span text:style-name="T41"><text:s text:c="11"/></text:span><text:span text:style-name="T40">try</text:span></text:p>
      <text:p text:style-name="P29"><text:span text:style-name="T41"><text:s text:c="11"/></text:span><text:span text:style-name="T40">{</text:span></text:p>
      <text:p text:style-name="P29"><text:span text:style-name="T41"><text:s text:c="15"/></text:span><text:span text:style-name="T43">auto</text:span><text:span text:style-name="T41"> lib </text:span><text:span text:style-name="T43">=</text:span><text:span text:style-name="T41"> std</text:span><text:span text:style-name="T40">::make_shared&lt;</text:span><text:span text:style-name="T41">SharedLibrary</text:span><text:span text:style-name="T40">&gt;(</text:span><text:span text:style-name="T41">path</text:span><text:span text:style-name="T40">);</text:span></text:p>
      <text:p text:style-name="P29"><text:span text:style-name="T41"><text:s text:c="14"/></text:span></text:p>
      <text:p text:style-name="P29"><text:span text:style-name="T42"><text:s text:c="5"/>// Bloqueo del mutex antes de modificar el mapa compartido</text:span></text:p>
      <text:p text:style-name="P29"><text:span text:style-name="T41"><text:s text:c="15"/>std</text:span><text:span text:style-name="T40">::</text:span><text:span text:style-name="T41">lock_guard</text:span><text:span text:style-name="T43">&lt;</text:span><text:span text:style-name="T41">std</text:span><text:span text:style-name="T40">::</text:span><text:span text:style-name="T41">mutex</text:span><text:span text:style-name="T43">&gt;</text:span><text:span text:style-name="T41"> </text:span><text:span text:style-name="T40">lock(</text:span><text:span text:style-name="T41">map_mutex</text:span><text:span text:style-name="T40">);</text:span></text:p>
      <text:p text:style-name="P29"><text:span text:style-name="T41"><text:s text:c="15"/></text:span><text:span text:style-name="T44">loaded_libraries</text:span><text:span text:style-name="T40">[</text:span><text:span text:style-name="T41">module_name</text:span><text:span text:style-name="T40">]</text:span><text:span text:style-name="T41"> </text:span><text:span text:style-name="T43">=</text:span><text:span text:style-name="T41"> lib</text:span><text:span text:style-name="T40">;</text:span></text:p>
      <text:p text:style-name="P29"><text:span text:style-name="T41"><text:s text:c="11"/></text:span><text:span text:style-name="T40">}</text:span></text:p>
      <text:p text:style-name="P29"><text:span text:style-name="T41"><text:s text:c="11"/></text:span><text:span text:style-name="T40">catch</text:span><text:span text:style-name="T41"> </text:span><text:span text:style-name="T40">(</text:span><text:span text:style-name="T43">const</text:span><text:span text:style-name="T41"> std</text:span><text:span text:style-name="T40">::</text:span><text:span text:style-name="T41">exception</text:span><text:span text:style-name="T43">&amp;</text:span><text:span text:style-name="T41"> e</text:span><text:span text:style-name="T40">)</text:span></text:p>
      <text:p text:style-name="P29"><text:span text:style-name="T41"><text:s text:c="11"/></text:span><text:span text:style-name="T40">{</text:span></text:p>
      <text:p text:style-name="P38"><text:soft-page-break/><text:span text:style-name="T42"><text:s text:c="19"/>/* En lugar de retornar false o usar exit(), </text:span></text:p>
      <text:p text:style-name="P38"><text:span text:style-name="T42"><text:s text:c="22"/>lanzamos una excepción controlada del Host */</text:span></text:p>
      <text:p text:style-name="P29"><text:span text:style-name="T41"><text:s text:c="15"/></text:span><text:span text:style-name="T40">throw</text:span><text:span text:style-name="T41"> std</text:span><text:span text:style-name="T40">::runtime_error("</text:span><text:span text:style-name="T46">ModuleManager Error Crítico al cargar </text:span><text:span text:style-name="T40">"</text:span><text:span text:style-name="T41"> </text:span><text:span text:style-name="T43">+</text:span><text:span text:style-name="T41"> module_name </text:span><text:span text:style-name="T43">+</text:span><text:span text:style-name="T41"> </text:span><text:span text:style-name="T40">"</text:span><text:span text:style-name="T46">: </text:span><text:span text:style-name="T40">"</text:span><text:span text:style-name="T41"> </text:span><text:span text:style-name="T43">+</text:span><text:span text:style-name="T41"> </text:span><text:span text:style-name="T44">e</text:span><text:span text:style-name="T40">.what());</text:span></text:p>
      <text:p text:style-name="P29"><text:span text:style-name="T41"><text:s text:c="11"/></text:span><text:span text:style-name="T40">}</text:span></text:p>
      <text:p text:style-name="P29"><text:span text:style-name="T41"><text:s text:c="7"/></text:span><text:span text:style-name="T40">}</text:span></text:p>
      <text:p text:style-name="P77"/>
      <text:p text:style-name="P27"><text:span text:style-name="T31">El método público </text:span><text:span text:style-name="T33">create_instance</text:span><text:span text:style-name="T31"> está</text:span><text:span text:style-name="T33"> </text:span><text:span text:style-name="T31">parametrizado mediante el uso de template para recibir la interfaz/tipo a la cual debe ser casteado el componente. Este método crea una instancia validando la versión del ABI</text:span><text:span text:style-name="T38"><text:note text:id="ftn4" text:note-class="footnote"><text:note-citation>4</text:note-citation><text:note-body><text:p text:style-name="P79"><text:span text:style-name="T26"/><text:span text:style-name="T29"> El término ABI (Application Binary Interface o Interfaz Binaria de Aplicación) define el contrato de bajo nivel entre dos módulos de software compilados o un componente y el sistema operativo. En el modelo de componentes, la ABI establece exactamente cómo interactúan a nivel de código máquina y de memoria.</text:span></text:p></text:note-body></text:note></text:span><text:span text:style-name="T31">. El parámetro </text:span><text:span text:style-name="T33">module_name</text:span><text:span text:style-name="T31"> es el nombre del archivo extraído de la ruta (ej. "Greeter"). Si se atrapa alguna excepción se lanza </text:span><text:span text:style-name="T33">std::runtime_error</text:span><text:span text:style-name="T31"> si hay discrepancias o errores internos; garantizando que el Host no reciba jamás un puntero inválido o nullptr.</text:span></text:p>
      <text:p text:style-name="P27"><text:span text:style-name="T31">Es importante agregar que se crea un </text:span><text:span text:style-name="T33">std::shared_ptr</text:span><text:span text:style-name="T31"> con un </text:span><text:span text:style-name="T33">custom deleter </text:span><text:span text:style-name="T31">(eliminador personalizado), este eliminador se pasa como segundo argumento en su constructor. Este puede ser una función normal, un functor (clase con el operador () sobrecargado), o una expresión lambda.</text:span></text:p>
      <text:p text:style-name="P78"><text:span text:style-name="T31"><text:tab/>Este método es un candidato futuro a revisar bajo el principio de responsabilidad única. A continuación se copia su código con comentarios aclaratorios:</text:span></text:p>
      <text:p text:style-name="P76"><text:span text:style-name="T43">template</text:span><text:span text:style-name="T40">&lt;</text:span><text:span text:style-name="T43">typename</text:span><text:span text:style-name="T41"> InterfaceType</text:span><text:span text:style-name="T40">&gt;</text:span></text:p>
      <text:p text:style-name="P76"><text:span text:style-name="T41"><text:s text:c="7"/>std</text:span><text:span text:style-name="T40">::</text:span><text:span text:style-name="T41">shared_ptr</text:span><text:span text:style-name="T40">&lt;</text:span><text:span text:style-name="T41">InterfaceType</text:span><text:span text:style-name="T40">&gt;</text:span><text:span text:style-name="T41"> </text:span><text:span text:style-name="T40">create_instance(</text:span><text:span text:style-name="T43">const</text:span><text:span text:style-name="T41"> std</text:span><text:span text:style-name="T40">::</text:span><text:span text:style-name="T41">string</text:span><text:span text:style-name="T43">&amp;</text:span><text:span text:style-name="T41"> </text:span><text:span text:style-name="T45">module_name</text:span><text:span text:style-name="T40">)</text:span></text:p>
      <text:p text:style-name="P76"><text:span text:style-name="T41"><text:s text:c="7"/></text:span><text:span text:style-name="T40">{</text:span></text:p>
      <text:p text:style-name="P76"><text:span text:style-name="T41"><text:s text:c="11"/>std</text:span><text:span text:style-name="T40">::</text:span><text:span text:style-name="T41">shared_ptr</text:span><text:span text:style-name="T43">&lt;</text:span><text:span text:style-name="T41">SharedLibrary</text:span><text:span text:style-name="T43">&gt;</text:span><text:span text:style-name="T41"> lib</text:span><text:span text:style-name="T40">;</text:span></text:p>
      <text:p text:style-name="Standard"/>
      <text:p text:style-name="Standard"><text:span text:style-name="T36">Ámbito artificial para reducir el tiempo de bloqueo del </text:span><text:span text:style-name="T35">mutex</text:span><text:span text:style-name="T36">:</text:span></text:p>
      <text:p text:style-name="Standard"/>
      <text:p text:style-name="P76"><text:span text:style-name="T42"><text:s text:c="11"/></text:span><text:span text:style-name="T40">{</text:span></text:p>
      <text:p text:style-name="P76"><text:span text:style-name="T41"><text:s text:c="15"/>std</text:span><text:span text:style-name="T40">::</text:span><text:span text:style-name="T41">lock_guard</text:span><text:span text:style-name="T43">&lt;</text:span><text:span text:style-name="T41">std</text:span><text:span text:style-name="T40">::</text:span><text:span text:style-name="T41">mutex</text:span><text:span text:style-name="T43">&gt;</text:span><text:span text:style-name="T41"> </text:span><text:span text:style-name="T40">lock(</text:span><text:span text:style-name="T41">map_mutex</text:span><text:span text:style-name="T40">);</text:span></text:p>
      <text:p text:style-name="P76"><text:span text:style-name="T41"><text:s text:c="15"/></text:span><text:span text:style-name="T43">auto</text:span><text:span text:style-name="T41"> it </text:span><text:span text:style-name="T43">=</text:span><text:span text:style-name="T41"> </text:span><text:span text:style-name="T44">loaded_libraries</text:span><text:span text:style-name="T40">.find(</text:span><text:span text:style-name="T41">module_name</text:span><text:span text:style-name="T40">);</text:span></text:p>
      <text:p text:style-name="P76"><text:span text:style-name="T41"><text:s text:c="15"/></text:span><text:span text:style-name="T40">if</text:span><text:span text:style-name="T41"> </text:span><text:span text:style-name="T40">(</text:span><text:span text:style-name="T41">it </text:span><text:span text:style-name="T43">==</text:span><text:span text:style-name="T41"> </text:span><text:span text:style-name="T44">loaded_libraries</text:span><text:span text:style-name="T40">.end())</text:span></text:p>
      <text:p text:style-name="P76"><text:span text:style-name="T41"><text:s text:c="15"/></text:span><text:span text:style-name="T40">{</text:span></text:p>
      <text:p text:style-name="P76"><text:soft-page-break/><text:span text:style-name="T41"><text:s text:c="19"/></text:span><text:span text:style-name="T40">throw</text:span><text:span text:style-name="T41"> std</text:span><text:span text:style-name="T40">::runtime_error("</text:span><text:span text:style-name="T46">ModuleManager Error: Módulo requerido no precargado -&gt; </text:span><text:span text:style-name="T40">"</text:span><text:span text:style-name="T41"> </text:span><text:span text:style-name="T43">+</text:span><text:span text:style-name="T41"> module_name</text:span><text:span text:style-name="T40">);</text:span></text:p>
      <text:p text:style-name="P76"><text:span text:style-name="T41"><text:s text:c="15"/></text:span><text:span text:style-name="T40">}</text:span></text:p>
      <text:p text:style-name="P76"><text:span text:style-name="T41"><text:s text:c="15"/>lib </text:span><text:span text:style-name="T43">=</text:span><text:span text:style-name="T41"> </text:span><text:span text:style-name="T44">it</text:span><text:span text:style-name="T40">-&gt;</text:span><text:span text:style-name="T44">second</text:span><text:span text:style-name="T40">;</text:span></text:p>
      <text:p text:style-name="P76"><text:span text:style-name="T41"><text:s text:c="11"/></text:span><text:span text:style-name="T40">}</text:span></text:p>
      <text:p text:style-name="Standard"/>
      <text:p text:style-name="Standard"/>
      <text:p text:style-name="Standard"/>
      <text:p text:style-name="Standard"/>
      <text:p text:style-name="Standard"/>
      <text:p text:style-name="Standard"><text:span text:style-name="T36">Obtención de las funciones externas como punteros a función</text:span><text:span text:style-name="T22">:</text:span></text:p>
      <text:p text:style-name="P9"/>
      <text:p text:style-name="P80"><text:span text:style-name="T41"><text:s/></text:span><text:span text:style-name="T43">auto</text:span><text:span text:style-name="T41"> get_api_func </text:span><text:span text:style-name="T43">= </text:span><text:span text:style-name="T40">(</text:span><text:span text:style-name="T41">get_api_version_func</text:span><text:span text:style-name="T40">)</text:span><text:span text:style-name="T44">lib</text:span><text:span text:style-name="T40">-&gt;get_symbol("</text:span><text:span text:style-name="T46">get_api_version</text:span><text:span text:style-name="T40">");</text:span></text:p>
      <text:p text:style-name="P80"><text:span text:style-name="T41"><text:s/></text:span><text:span text:style-name="T43">auto</text:span><text:span text:style-name="T41"> create_func </text:span><text:span text:style-name="T43">= </text:span><text:span text:style-name="T40">(</text:span><text:span text:style-name="T41">create_component_func</text:span><text:span text:style-name="T40">)</text:span><text:span text:style-name="T44">lib</text:span><text:span text:style-name="T40">-&gt;get_symbol("</text:span><text:span text:style-name="T46">create_component</text:span><text:span text:style-name="T40">");</text:span></text:p>
      <text:p text:style-name="P80"><text:span text:style-name="T41"><text:s/></text:span><text:span text:style-name="T43">auto</text:span><text:span text:style-name="T41"> destroy_func </text:span><text:span text:style-name="T43">= </text:span><text:span text:style-name="T40">(</text:span><text:span text:style-name="T41">destroy_component_func</text:span><text:span text:style-name="T40">)</text:span><text:span text:style-name="T44">lib</text:span><text:span text:style-name="T40">-&gt;get_symbol("</text:span><text:span text:style-name="T46">destroy_component</text:span><text:span text:style-name="T40">");</text:span></text:p>
      <text:p text:style-name="P80"><text:span text:style-name="T41"><text:s text:c="3"/></text:span><text:span text:style-name="T40">if</text:span><text:span text:style-name="T41"> </text:span><text:span text:style-name="T40">(</text:span><text:span text:style-name="T43">!</text:span><text:span text:style-name="T41">get_api_func </text:span><text:span text:style-name="T43">||</text:span><text:span text:style-name="T41"> </text:span><text:span text:style-name="T43">!</text:span><text:span text:style-name="T41">create_func </text:span><text:span text:style-name="T43">||</text:span><text:span text:style-name="T41"> </text:span><text:span text:style-name="T43">!</text:span><text:span text:style-name="T41">destroy_func</text:span><text:span text:style-name="T40">){</text:span></text:p>
      <text:p text:style-name="P80"><text:span text:style-name="T41"><text:s text:c="7"/></text:span><text:span text:style-name="T40">throw</text:span><text:span text:style-name="T41"> std</text:span><text:span text:style-name="T40">::runtime_error("</text:span><text:span text:style-name="T46">ModuleManager Error: Faltan símbolos requeridos en </text:span><text:span text:style-name="T40">"</text:span><text:span text:style-name="T41"> </text:span><text:span text:style-name="T43">+</text:span><text:span text:style-name="T41"> module_name</text:span><text:span text:style-name="T40">);</text:span></text:p>
      <text:p text:style-name="P80"><text:span text:style-name="T41"><text:s text:c="3"/></text:span><text:span text:style-name="T40">}</text:span></text:p>
      <text:p text:style-name="P12"/>
      <text:p text:style-name="P12"><text:span text:style-name="T5">Control de versiones estricto. Comparamos la versión de la interfaz con la que compiló la biblioteca compartida. contra la versión actual que maneja el Host. Si difieren, abortamos por excepción.</text:span></text:p>
      <text:p text:style-name="Standard"/>
      <text:p text:style-name="P80"><text:span text:style-name="T41"><text:s text:c="3"/></text:span><text:span text:style-name="T43">int</text:span><text:span text:style-name="T41"> module_api_version </text:span><text:span text:style-name="T43">=</text:span><text:span text:style-name="T41"> </text:span><text:span text:style-name="T40">get_api_func();</text:span></text:p>
      <text:p text:style-name="P80"><text:soft-page-break/><text:span text:style-name="T41"><text:s text:c="3"/></text:span><text:span text:style-name="T40">if</text:span><text:span text:style-name="T41"> </text:span><text:span text:style-name="T40">(</text:span><text:span text:style-name="T41">module_api_version </text:span><text:span text:style-name="T43">!=</text:span><text:span text:style-name="T41"> CURRENT_API_VERSION</text:span><text:span text:style-name="T40">){</text:span></text:p>
      <text:p text:style-name="P80"><text:span text:style-name="T41"><text:s text:c="3"/></text:span><text:span text:style-name="T40">throw</text:span><text:span text:style-name="T41"> std</text:span><text:span text:style-name="T40">::runtime_error("</text:span><text:span text:style-name="T46">ModuleManager Error: Discrepancia de ABI en </text:span><text:span text:style-name="T40">"</text:span><text:span text:style-name="T41"> </text:span><text:span text:style-name="T43">+</text:span><text:span text:style-name="T41"> module_name </text:span><text:span text:style-name="T43">+</text:span><text:span text:style-name="T41"> </text:span><text:span text:style-name="T40">"</text:span><text:span text:style-name="T46">. Esperado: </text:span><text:span text:style-name="T40">"</text:span><text:span text:style-name="T41"> </text:span><text:span text:style-name="T43">+</text:span><text:span text:style-name="T41"> std</text:span><text:span text:style-name="T40">::to_string(</text:span><text:span text:style-name="T41">CURRENT_API_VERSION</text:span><text:span text:style-name="T40">)</text:span><text:span text:style-name="T41"> </text:span><text:span text:style-name="T43">+</text:span><text:span text:style-name="T41"> <text:s text:c="38"/></text:span><text:span text:style-name="T40">"</text:span><text:span text:style-name="T46">, Encontrado: </text:span><text:span text:style-name="T40">"</text:span><text:span text:style-name="T41"> </text:span><text:span text:style-name="T43">+</text:span><text:span text:style-name="T41"> std</text:span><text:span text:style-name="T40">::to_string(</text:span><text:span text:style-name="T41">module_api_version</text:span><text:span text:style-name="T40">));</text:span></text:p>
      <text:p text:style-name="P81"><text:span text:style-name="T41"><text:s text:c="4"/></text:span><text:span text:style-name="T40">}</text:span></text:p>
      <text:p text:style-name="P12"><text:span text:style-name="T5">Invocamos a la </text:span><text:span text:style-name="T6">biblioteca compartida</text:span><text:span text:style-name="T5"> mediante su función creadora para crear el objeto en su propio</text:span><text:span text:style-name="T6"> heap</text:span><text:span text:style-name="T5">.</text:span></text:p>
      <text:p text:style-name="Standard"/>
      <text:p text:style-name="P80"><text:span text:style-name="T41">IComponent</text:span><text:span text:style-name="T43">*</text:span><text:span text:style-name="T41"> raw_instance </text:span><text:span text:style-name="T43">=</text:span><text:span text:style-name="T41"> </text:span><text:span text:style-name="T40">create_func();</text:span></text:p>
      <text:p text:style-name="P80"><text:span text:style-name="T40">if</text:span><text:span text:style-name="T41"> </text:span><text:span text:style-name="T40">(</text:span><text:span text:style-name="T43">!</text:span><text:span text:style-name="T41">raw_instance</text:span><text:span text:style-name="T40">)</text:span></text:p>
      <text:p text:style-name="P80"><text:span text:style-name="T40">{</text:span><text:span text:style-name="T41"> </text:span></text:p>
      <text:p text:style-name="P82"><text:span text:style-name="T40">throw</text:span><text:span text:style-name="T41"> std</text:span><text:span text:style-name="T40">::runtime_error("</text:span><text:span text:style-name="T46">ModuleManager Error: La fábrica de la biblioteca </text:span></text:p>
      <text:p text:style-name="P82"><text:span text:style-name="T46"><text:s text:c="40"/>devolvió una instancia nula.</text:span><text:span text:style-name="T40">");</text:span></text:p>
      <text:p text:style-name="P80"><text:span text:style-name="T40">}</text:span></text:p>
      <text:p text:style-name="Standard"/>
      <text:p text:style-name="Standard"/>
      <text:p text:style-name="Standard"/>
      <text:p text:style-name="Standard"/>
      <text:p text:style-name="Standard"/>
      <text:p text:style-name="Standard"/>
      <text:p text:style-name="P12"><text:span text:style-name="T6">“Casteamos” </text:span><text:span text:style-name="T5">a la </text:span><text:span text:style-name="T6">interfaz solicitada</text:span><text:span text:style-name="T5"> luego si este casteo falla (entrega un </text:span><text:span text:style-name="T6">puntero nulo</text:span><text:span text:style-name="T5">) y limpiamos para evitar fugas invocando a la </text:span><text:span text:style-name="T6">función de destrucción</text:span><text:span text:style-name="T5"> del componente:</text:span></text:p>
      <text:p text:style-name="P5"/>
      <text:p text:style-name="P76"><text:span text:style-name="T41">InterfaceType</text:span><text:span text:style-name="T43">*</text:span><text:span text:style-name="T41"> casted_instance</text:span><text:span text:style-name="T43">=dynamic_cast&lt;</text:span><text:span text:style-name="T41">InterfaceType</text:span><text:span text:style-name="T43">*&gt;</text:span><text:span text:style-name="T40">(</text:span><text:span text:style-name="T41">raw_instance</text:span><text:span text:style-name="T40">);</text:span></text:p>
      <text:p text:style-name="P76"><text:span text:style-name="T40">if</text:span><text:span text:style-name="T41"> </text:span><text:span text:style-name="T40">(</text:span><text:span text:style-name="T43">!</text:span><text:span text:style-name="T41">casted_instance</text:span><text:span text:style-name="T40">)</text:span></text:p>
      <text:p text:style-name="P76"><text:soft-page-break/><text:span text:style-name="T40">{</text:span></text:p>
      <text:p text:style-name="P76"><text:span text:style-name="T41"><text:s text:c="4"/></text:span><text:span text:style-name="T40">destroy_func(</text:span><text:span text:style-name="T41">raw_instance</text:span><text:span text:style-name="T40">);</text:span></text:p>
      <text:p text:style-name="P76"><text:span text:style-name="T41"><text:s text:c="4"/></text:span><text:span text:style-name="T40">throw</text:span><text:span text:style-name="T41"> std</text:span><text:span text:style-name="T40">::runtime_error("</text:span><text:span text:style-name="T46">ModuleManager Error: El componente </text:span><text:span text:style-name="T40">"</text:span><text:span text:style-name="T41"> </text:span><text:span text:style-name="T43">+</text:span></text:p>
      <text:p text:style-name="P76"><text:span text:style-name="T41"><text:s text:c="20"/>module_name </text:span><text:span text:style-name="T43">+</text:span><text:span text:style-name="T41"> </text:span><text:span text:style-name="T40">"</text:span><text:span text:style-name="T46"> no implementa la interfaz solicitada.</text:span><text:span text:style-name="T40">");</text:span></text:p>
      <text:p text:style-name="P76"><text:span text:style-name="T40">}</text:span></text:p>
      <text:p text:style-name="Standard"/>
      <text:p text:style-name="P5"/>
      <text:p text:style-name="P84"><text:bookmark text:name="_y5kggxj7ibvj"/>Gestión Segura del Ciclo de Vida Cruzado (Custom Deleter &amp; RAII)</text:p>
      <text:p text:style-name="Standard"/>
      <text:p text:style-name="P12"><text:span text:style-name="T6">“LA MAGIA”</text:span><text:span text:style-name="T5">: Garantía de Coherencia de Memoria y Frontera Binaria. Este bloque resuelve dos de los problemas más críticos en arquitecturas de plugins:</text:span></text:p>
      <text:list xml:id="list1671604029" text:style-name="WWNum6">
        <text:list-item>
          <text:p text:style-name="P40"><text:span text:style-name="T6">Simetría en la Asignación (Asymmetry Mitigation)</text:span><text:span text:style-name="T5">:</text:span></text:p>
          <text:list>
            <text:list-item>
              <text:p text:style-name="P53"><text:span text:style-name="T5">En C++, la memoria DEBE ser liberada en el mismo contexto (heap/runtime) en el que fue reservada. Delega la destrucción a </text:span><text:span text:style-name="T6">'destroy_func'</text:span><text:span text:style-name="T5"> </text:span><text:span text:style-name="T6">(dentro de la biblioteca compartida)</text:span><text:span text:style-name="T5">, evitando que la </text:span><text:span text:style-name="T6">aplicación host</text:span><text:span text:style-name="T5"> intente hacer un </text:span><text:span text:style-name="T6">'delete'</text:span><text:span text:style-name="T5"> local, lo que provocaría corrupción del heap o un crash inmediato.</text:span></text:p>
            </text:list-item>
          </text:list>
        </text:list-item>
        <text:list-item>
          <text:p text:style-name="P40"><text:span text:style-name="T6">Prevención de Descarga Prematura (Lifetime Interlocking via RAII):</text:span></text:p>
          <text:list>
            <text:list-item>
              <text:p text:style-name="P53"><text:span text:style-name="T5">Al capturar el </text:span><text:span text:style-name="T6">'std::shared_ptr&lt;SharedLibrary&gt; lib'</text:span><text:span text:style-name="T5"> </text:span><text:span text:style-name="T6">por VALOR dentro de la lambda</text:span><text:span text:style-name="T5">, </text:span><text:span text:style-name="T6">incrementamos el contador de referencias de la biblioteca compartida.</text:span><text:span text:style-name="T5"> Esto genera un cerrojo lógico: incluso si el </text:span><text:span text:style-name="T6">'ModuleManager'</text:span><text:span text:style-name="T5"> decide liberar la biblioteca o es destruido, el binario físico </text:span><text:span text:style-name="T6">(.so/.dll)</text:span><text:span text:style-name="T5"> PERMANECERÁ mapeado en el espacio de direccionamiento del Host. La llamada del sistema </text:span><text:span text:style-name="T6">('dlclose')</text:span><text:span text:style-name="T5"> solo ocurrirá cuando el último componente creado por este manager sea destruido y la lambda suelte su copia de </text:span><text:span text:style-name="T6">'lib'</text:span><text:span text:style-name="T5">. Esto es lo que verdaderamente previene los </text:span><text:span text:style-name="T6">punteros colgantes (dangling pointers)</text:span><text:span text:style-name="T5"> a nivel de biblioteca.</text:span></text:p>
            </text:list-item>
          </text:list>
        </text:list-item>
      </text:list>
      <text:p text:style-name="P5"/>
      <text:p text:style-name="P76"><text:span text:style-name="T41"><text:s text:c="11"/></text:span><text:span text:style-name="T43">auto</text:span><text:span text:style-name="T41"> deleter </text:span><text:span text:style-name="T43">=</text:span><text:span text:style-name="T41"> </text:span><text:span text:style-name="T40">[</text:span><text:span text:style-name="T45">destroy_func</text:span><text:span text:style-name="T40">,</text:span><text:span text:style-name="T41"> </text:span><text:span text:style-name="T45">lib</text:span><text:span text:style-name="T40">](</text:span><text:span text:style-name="T41">InterfaceType</text:span><text:span text:style-name="T43">*</text:span><text:span text:style-name="T41"> </text:span><text:span text:style-name="T45">ptr</text:span><text:span text:style-name="T40">)</text:span></text:p>
      <text:p text:style-name="P76"><text:span text:style-name="T41"><text:s text:c="11"/></text:span><text:span text:style-name="T40">{</text:span></text:p>
      <text:p text:style-name="P76"><text:span text:style-name="T41"><text:s text:c="15"/></text:span><text:span text:style-name="T40">destroy_func(</text:span><text:span text:style-name="T41">ptr</text:span><text:span text:style-name="T40">);</text:span></text:p>
      <text:p text:style-name="P76"><text:span text:style-name="T41"><text:s text:c="11"/></text:span><text:span text:style-name="T40">};</text:span></text:p>
      <text:p text:style-name="P76"><text:span text:style-name="T41"><text:s text:c="11"/></text:span><text:span text:style-name="T40">return</text:span><text:span text:style-name="T41"> std</text:span><text:span text:style-name="T40">::shared_ptr&lt;</text:span><text:span text:style-name="T41">InterfaceType</text:span><text:span text:style-name="T40">&gt;(</text:span><text:span text:style-name="T41">casted_instance</text:span><text:span text:style-name="T40">,</text:span><text:span text:style-name="T41"> deleter</text:span><text:span text:style-name="T40">);</text:span></text:p>
      <text:p text:style-name="P76"><text:span text:style-name="T41"><text:s text:c="7"/></text:span><text:span text:style-name="T40">}</text:span></text:p>
      <text:p text:style-name="P76"><text:soft-page-break/><text:span text:style-name="T40">};</text:span></text:p>
      <text:p text:style-name="P76"><text:span text:style-name="T40">#endif</text:span><text:span text:style-name="T42"> // MODULE_MANAGER_HPP</text:span></text:p>
      <text:p text:style-name="Standard"/>
      <text:p text:style-name="Heading_20_3"><text:bookmark text:name="_l878vl52nmit"/></text:p>
      <text:p text:style-name="Heading_20_3"><text:bookmark text:name="_sxh44jwvol9"/>greeter_component.cpp:</text:p>
      <text:p text:style-name="P69"><text:span text:style-name="T5">Esta es la implementación concreta de componente ejemplo que respeta el límite sin excepciones. Para no propagarlas por fuera del ámbito de la biblioteca compartida.</text:span></text:p>
      <text:p text:style-name="Standard"/>
      <text:p text:style-name="P10"><text:a xlink:type="simple" xlink:href="https://github.com/gabrielinuz/cpp-component-model/blob/main/src/greeter_component.cpp" text:style-name="ListLabel_20_58" text:visited-style-name="ListLabel_20_58"><text:span text:style-name="T20">https://github.com/gabrielinuz/cpp-component-model/blob/main/src/greeter_component.cpp</text:span></text:a> </text:p>
      <text:p text:style-name="Standard"/>
      <text:p text:style-name="P76"><text:span text:style-name="T43">class</text:span><text:span text:style-name="T41"> GreeterComponent </text:span><text:span text:style-name="T40">:</text:span><text:span text:style-name="T41"> </text:span><text:span text:style-name="T43">public</text:span><text:span text:style-name="T41"> IGreeter</text:span></text:p>
      <text:p text:style-name="P76"><text:span text:style-name="T40">{</text:span></text:p>
      <text:p text:style-name="P76"><text:span text:style-name="T41"><text:s text:c="3"/></text:span><text:span text:style-name="T43">private</text:span><text:span text:style-name="T40">:</text:span></text:p>
      <text:p text:style-name="P76"><text:span text:style-name="T41"><text:s text:c="7"/>std</text:span><text:span text:style-name="T40">::</text:span><text:span text:style-name="T41">string prefix</text:span><text:span text:style-name="T40">;</text:span></text:p>
      <text:p text:style-name="P76"><text:span text:style-name="T41"><text:s text:c="3"/></text:span><text:span text:style-name="T43">public</text:span><text:span text:style-name="T40">:</text:span></text:p>
      <text:p text:style-name="P76"><text:span text:style-name="T41"><text:s text:c="7"/></text:span><text:span text:style-name="T40">GreeterComponent()</text:span><text:span text:style-name="T41"> </text:span><text:span text:style-name="T40">:</text:span><text:span text:style-name="T41"> </text:span><text:span text:style-name="T40">prefix("</text:span><text:span text:style-name="T46">Hello, </text:span><text:span text:style-name="T40">")</text:span><text:span text:style-name="T41"> </text:span><text:span text:style-name="T40">{}</text:span></text:p>
      <text:p text:style-name="P76"><text:span text:style-name="T41"><text:s text:c="7"/></text:span><text:span text:style-name="T40">~GreeterComponent()</text:span><text:span text:style-name="T41"> </text:span><text:span text:style-name="T43">noexcept</text:span><text:span text:style-name="T41"> </text:span><text:span text:style-name="T43">override</text:span><text:span text:style-name="T41"> </text:span><text:span text:style-name="T43">=</text:span><text:span text:style-name="T41"> </text:span><text:span text:style-name="T45">default</text:span><text:span text:style-name="T40">;</text:span></text:p>
      <text:p text:style-name="Standard"/>
      <text:p text:style-name="P5"/>
      <text:p text:style-name="P12"><text:span text:style-name="T5">Implementación envuelta en try-catch. Atrapa </text:span><text:span text:style-name="T6">cualquier excepción</text:span><text:span text:style-name="T5"> C++ (como </text:span><text:span text:style-name="T6">std::bad_alloc</text:span><text:span text:style-name="T5"> en caso de falta de memoria al concatenar </text:span><text:span text:style-name="T6">std::string</text:span><text:span text:style-name="T5">) impidiendo que cruce el ABI:</text:span></text:p>
      <text:p text:style-name="Standard"/>
      <text:p text:style-name="P76"><text:span text:style-name="T41">ComponentResult </text:span><text:span text:style-name="T40">greet(</text:span><text:span text:style-name="T43">const</text:span><text:span text:style-name="T41"> </text:span><text:span text:style-name="T43">char*</text:span><text:span text:style-name="T41"> </text:span><text:span text:style-name="T45">name</text:span><text:span text:style-name="T40">,</text:span><text:span text:style-name="T41"> </text:span><text:span text:style-name="T43">char*</text:span><text:span text:style-name="T41"> </text:span><text:span text:style-name="T45">out_buffer</text:span><text:span text:style-name="T40">,</text:span><text:span text:style-name="T41"> </text:span><text:span text:style-name="T43">size_t</text:span><text:span text:style-name="T41"> </text:span><text:span text:style-name="T45">buffer_size</text:span><text:span text:style-name="T40">)</text:span><text:span text:style-name="T41"> </text:span><text:span text:style-name="T43">noexcept</text:span><text:span text:style-name="T41"> </text:span><text:span text:style-name="T43">override</text:span></text:p>
      <text:p text:style-name="P76"><text:soft-page-break/><text:span text:style-name="T40">{</text:span></text:p>
      <text:p text:style-name="P76"><text:span text:style-name="T41"><text:s text:c="11"/></text:span><text:span text:style-name="T40">if</text:span><text:span text:style-name="T41"> </text:span><text:span text:style-name="T40">(</text:span><text:span text:style-name="T43">!</text:span><text:span text:style-name="T41">name </text:span><text:span text:style-name="T43">||</text:span><text:span text:style-name="T41"> </text:span><text:span text:style-name="T43">!</text:span><text:span text:style-name="T41">out_buffer </text:span><text:span text:style-name="T43">||</text:span><text:span text:style-name="T41"> buffer_size </text:span><text:span text:style-name="T43">==</text:span><text:span text:style-name="T41"> </text:span><text:span text:style-name="T45">0</text:span><text:span text:style-name="T40">)</text:span></text:p>
      <text:p text:style-name="P76"><text:span text:style-name="T41"><text:s text:c="11"/></text:span><text:span text:style-name="T40">{</text:span></text:p>
      <text:p text:style-name="P76"><text:span text:style-name="T41"><text:s text:c="15"/></text:span><text:span text:style-name="T40">return</text:span><text:span text:style-name="T41"> ComponentResult</text:span><text:span text:style-name="T40">::</text:span><text:span text:style-name="T41">ERROR_INVALID_ARGUMENT</text:span><text:span text:style-name="T40">;</text:span></text:p>
      <text:p text:style-name="P76"><text:span text:style-name="T41"><text:s text:c="11"/></text:span><text:span text:style-name="T40">}</text:span></text:p>
      <text:p text:style-name="P76"><text:span text:style-name="T41"><text:s text:c="11"/></text:span><text:span text:style-name="T40">try</text:span></text:p>
      <text:p text:style-name="P76"><text:span text:style-name="T41"><text:s text:c="11"/></text:span><text:span text:style-name="T40">{</text:span></text:p>
      <text:p text:style-name="P76"><text:span text:style-name="T41"><text:s text:c="15"/>std</text:span><text:span text:style-name="T40">::</text:span><text:span text:style-name="T41">string result </text:span><text:span text:style-name="T43">=</text:span><text:span text:style-name="T41"> prefix </text:span><text:span text:style-name="T43">+</text:span><text:span text:style-name="T41"> name </text:span><text:span text:style-name="T43">+</text:span><text:span text:style-name="T41"> </text:span><text:span text:style-name="T40">"</text:span><text:span text:style-name="T46">!</text:span><text:span text:style-name="T40">";</text:span></text:p>
      <text:p text:style-name="P76"><text:span text:style-name="T41"><text:s text:c="14"/></text:span></text:p>
      <text:p text:style-name="P76"><text:span text:style-name="T41"><text:s text:c="15"/></text:span><text:span text:style-name="T40">if</text:span><text:span text:style-name="T41"> </text:span><text:span text:style-name="T40">(</text:span><text:span text:style-name="T44">result</text:span><text:span text:style-name="T40">.length()</text:span><text:span text:style-name="T41"> </text:span><text:span text:style-name="T43">&gt;=</text:span><text:span text:style-name="T41"> buffer_size</text:span><text:span text:style-name="T40">)</text:span></text:p>
      <text:p text:style-name="P76"><text:span text:style-name="T41"><text:s text:c="15"/></text:span><text:span text:style-name="T40">{</text:span></text:p>
      <text:p text:style-name="P76"><text:span text:style-name="T41"><text:s text:c="19"/></text:span><text:span text:style-name="T40">return</text:span><text:span text:style-name="T41"> ComponentResult</text:span><text:span text:style-name="T40">::</text:span><text:span text:style-name="T41">ERROR_INVALID_ARGUMENT</text:span><text:span text:style-name="T40">;</text:span></text:p>
      <text:p text:style-name="P76"><text:span text:style-name="T41"><text:s text:c="15"/></text:span><text:span text:style-name="T40">}</text:span></text:p>
      <text:p text:style-name="P76"><text:span text:style-name="T41"><text:s text:c="15"/></text:span><text:span text:style-name="T40">strncpy(</text:span><text:span text:style-name="T41">out_buffer</text:span><text:span text:style-name="T40">,</text:span><text:span text:style-name="T41"> </text:span><text:span text:style-name="T44">result</text:span><text:span text:style-name="T40">.c_str(),</text:span><text:span text:style-name="T41"> buffer_size </text:span><text:span text:style-name="T43">-</text:span><text:span text:style-name="T41"> </text:span><text:span text:style-name="T45">1</text:span><text:span text:style-name="T40">);</text:span></text:p>
      <text:p text:style-name="P76"><text:span text:style-name="T41"><text:s text:c="15"/></text:span><text:span text:style-name="T44">out_buffer</text:span><text:span text:style-name="T40">[</text:span><text:span text:style-name="T41">buffer_size </text:span><text:span text:style-name="T43">-</text:span><text:span text:style-name="T41"> </text:span><text:span text:style-name="T45">1</text:span><text:span text:style-name="T40">]</text:span><text:span text:style-name="T41"> </text:span><text:span text:style-name="T43">=</text:span><text:span text:style-name="T41"> </text:span><text:span text:style-name="T40">'</text:span><text:span text:style-name="T48">\0</text:span><text:span text:style-name="T40">';</text:span><text:span text:style-name="T41"> <text:s text:c="10"/></text:span></text:p>
      <text:p text:style-name="P76"><text:span text:style-name="T41"><text:s text:c="15"/></text:span><text:span text:style-name="T40">return</text:span><text:span text:style-name="T41"> ComponentResult</text:span><text:span text:style-name="T40">::</text:span><text:span text:style-name="T41">SUCCESS</text:span><text:span text:style-name="T40">;</text:span></text:p>
      <text:p text:style-name="P76"><text:span text:style-name="T41"><text:s text:c="11"/></text:span><text:span text:style-name="T40">}</text:span></text:p>
      <text:p text:style-name="P4"/>
      <text:p text:style-name="Standard"><text:span text:style-name="T5">Un bloque catch-all asegura que </text:span><text:span text:style-name="T6">NINGUNA (operador triple punto …)</text:span><text:span text:style-name="T5"> excepción escape hacia la aplicación host</text:span>:</text:p>
      <text:p text:style-name="Standard"/>
      <text:p text:style-name="P76"><text:span text:style-name="T41"><text:s text:c="11"/></text:span><text:span text:style-name="T40">catch</text:span><text:span text:style-name="T41"> </text:span><text:span text:style-name="T40">(</text:span><text:span text:style-name="T41">...</text:span><text:span text:style-name="T40">)</text:span></text:p>
      <text:p text:style-name="P76"><text:soft-page-break/><text:span text:style-name="T41"><text:s text:c="11"/></text:span><text:span text:style-name="T40">{</text:span></text:p>
      <text:p text:style-name="P76"><text:span text:style-name="T41"><text:s text:c="15"/></text:span><text:span text:style-name="T40">return</text:span><text:span text:style-name="T41"> ComponentResult</text:span><text:span text:style-name="T40">::</text:span><text:span text:style-name="T41">ERROR_INTERNAL</text:span><text:span text:style-name="T40">;</text:span></text:p>
      <text:p text:style-name="P76"><text:span text:style-name="T41"><text:s text:c="11"/></text:span><text:span text:style-name="T40">}</text:span></text:p>
      <text:p text:style-name="P76"><text:span text:style-name="T41"><text:s text:c="7"/></text:span><text:span text:style-name="T40">}</text:span></text:p>
      <text:p text:style-name="P76"><text:span text:style-name="T40">};</text:span></text:p>
      <text:p text:style-name="Standard"/>
      <text:p text:style-name="Standard"><text:span text:style-name="T5">La función externa get_api_version expone la versión con la que fue compilada esta biblioteca compartida:</text:span></text:p>
      <text:p text:style-name="Standard"/>
      <text:p text:style-name="P76"><text:span text:style-name="T43">extern</text:span><text:span text:style-name="T41"> </text:span><text:span text:style-name="T40">"</text:span><text:span text:style-name="T46">C</text:span><text:span text:style-name="T40">"</text:span><text:span text:style-name="T41"> </text:span><text:span text:style-name="T43">int</text:span><text:span text:style-name="T41"> </text:span><text:span text:style-name="T40">get_api_version()</text:span><text:span text:style-name="T41"> </text:span><text:span text:style-name="T43">noexcept</text:span></text:p>
      <text:p text:style-name="P76"><text:span text:style-name="T40">{</text:span></text:p>
      <text:p text:style-name="P76"><text:span text:style-name="T41"><text:s text:c="3"/></text:span><text:span text:style-name="T40">return</text:span><text:span text:style-name="T41"> CURRENT_API_VERSION</text:span><text:span text:style-name="T40">;</text:span></text:p>
      <text:p text:style-name="P76"><text:span text:style-name="T40">}</text:span></text:p>
      <text:p text:style-name="P6"/>
      <text:p text:style-name="P12"><text:span text:style-name="T5">La función externa create_component retorna la instancia del </text:span><text:span text:style-name="T6">GreeterComponent</text:span><text:span text:style-name="T5"> y si algo sale mal atrapa cualquier excepción retornando un puntero nulo:</text:span></text:p>
      <text:p text:style-name="P6"/>
      <text:p text:style-name="P76"><text:span text:style-name="T43">extern</text:span><text:span text:style-name="T41"> </text:span><text:span text:style-name="T40">"</text:span><text:span text:style-name="T46">C</text:span><text:span text:style-name="T40">"</text:span><text:span text:style-name="T41"> IComponent</text:span><text:span text:style-name="T43">*</text:span><text:span text:style-name="T41"> </text:span><text:span text:style-name="T40">create_component()</text:span><text:span text:style-name="T41"> </text:span><text:span text:style-name="T43">noexcept</text:span></text:p>
      <text:p text:style-name="P76"><text:span text:style-name="T40">{</text:span></text:p>
      <text:p text:style-name="P76"><text:span text:style-name="T41"><text:s text:c="3"/></text:span><text:span text:style-name="T40">try</text:span></text:p>
      <text:p text:style-name="P76"><text:span text:style-name="T41"><text:s text:c="3"/></text:span><text:span text:style-name="T40">{</text:span></text:p>
      <text:p text:style-name="P76"><text:span text:style-name="T41"><text:s text:c="7"/></text:span><text:span text:style-name="T40">return</text:span><text:span text:style-name="T41"> </text:span><text:span text:style-name="T43">new</text:span><text:span text:style-name="T41"> </text:span><text:span text:style-name="T40">GreeterComponent();</text:span></text:p>
      <text:p text:style-name="P76"><text:span text:style-name="T41"><text:s text:c="3"/></text:span><text:span text:style-name="T40">}</text:span></text:p>
      <text:p text:style-name="P76"><text:soft-page-break/><text:span text:style-name="T41"><text:s text:c="3"/></text:span><text:span text:style-name="T40">catch</text:span><text:span text:style-name="T41"> </text:span><text:span text:style-name="T40">(</text:span><text:span text:style-name="T41">...</text:span><text:span text:style-name="T40">)</text:span></text:p>
      <text:p text:style-name="P76"><text:span text:style-name="T41"><text:s text:c="3"/></text:span><text:span text:style-name="T40">{</text:span></text:p>
      <text:p text:style-name="P76"><text:span text:style-name="T41"><text:s text:c="7"/></text:span><text:span text:style-name="T40">return</text:span><text:span text:style-name="T41"> </text:span><text:span text:style-name="T45">nullptr</text:span><text:span text:style-name="T40">;</text:span></text:p>
      <text:p text:style-name="P76"><text:span text:style-name="T41"><text:s text:c="3"/></text:span><text:span text:style-name="T40">}</text:span></text:p>
      <text:p text:style-name="P76"><text:span text:style-name="T40">}</text:span></text:p>
      <text:p text:style-name="Standard"/>
      <text:p text:style-name="P12"><text:span text:style-name="T5">Por último la función externa </text:span><text:span text:style-name="T6">destroy_component</text:span><text:span text:style-name="T5"> destruye la instancia que se le pasa por parámetro (utilizada en la </text:span><text:span text:style-name="T6">aplicación host</text:span><text:span text:style-name="T5"> y creada por </text:span><text:span text:style-name="T6">module_manager.hpp</text:span><text:span text:style-name="T5">) en el contexto de memoria de la biblioteca compartida. Además el operador delete en C++ ya maneja internamente la comprobación de nullptr</text:span><text:span text:style-name="T6">:</text:span></text:p>
      <text:p text:style-name="Standard"/>
      <text:p text:style-name="P76"><text:span text:style-name="T43">extern</text:span><text:span text:style-name="T41"> </text:span><text:span text:style-name="T40">"</text:span><text:span text:style-name="T46">C</text:span><text:span text:style-name="T40">"</text:span><text:span text:style-name="T41"> </text:span><text:span text:style-name="T43">void</text:span><text:span text:style-name="T41"> </text:span><text:span text:style-name="T40">destroy_component(</text:span><text:span text:style-name="T41">IComponent</text:span><text:span text:style-name="T43">*</text:span><text:span text:style-name="T41"> instance</text:span><text:span text:style-name="T40">)</text:span><text:span text:style-name="T41"> </text:span><text:span text:style-name="T43">noexcept</text:span></text:p>
      <text:p text:style-name="P76"><text:span text:style-name="T40">{</text:span></text:p>
      <text:p text:style-name="P76"><text:span text:style-name="T41"><text:s text:c="3"/></text:span><text:span text:style-name="T43">delete</text:span><text:span text:style-name="T41"> instance</text:span><text:span text:style-name="T40">;</text:span></text:p>
      <text:p text:style-name="P76"><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945in" fo:margin-bottom="0.0555in" loext:contextual-spacing="false" fo:line-height="150%" fo:text-align="center" style:justify-single-word="false" fo:keep-together="always" fo:keep-with-next="always"/>
      <style:text-properties style:font-name="Courier New" fo:font-family="'Courier New'" style:font-family-generic="roman" style:font-pitch="variable" fo:font-size="13pt" fo:font-weight="bold" style:font-name-asian="Courier New1" style:font-family-asian="'Courier New'" style:font-family-generic-asian="system" style:font-pitch-asian="variable" style:font-size-asian="13pt" style:font-weight-asian="bold" style:font-name-complex="Courier New1" style:font-family-complex="'Courier New'" style:font-family-generic-complex="system" style:font-pitch-complex="variable" style:font-size-complex="13pt" style:font-weight-complex="bold"/>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style:font-name="Courier New" fo:font-family="'Courier New'" style:font-family-generic="roman" style:font-pitch="variable" fo:font-size="13pt" fo:font-weight="bold" style:font-name-asian="Courier New1" style:font-family-asian="'Courier New'" style:font-family-generic-asian="system" style:font-pitch-asian="variable" style:font-size-asian="13pt" style:font-weight-asian="bold" style:font-name-complex="Courier New1" style:font-family-complex="'Courier New'"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5in" fo:margin-right="0in" fo:margin-top="0.0417in" fo:margin-bottom="0.1665in" loext:contextual-spacing="false" fo:line-height="150%" fo:text-align="center" style:justify-single-word="false" fo:keep-together="always" fo:text-indent="0in" style:auto-text-indent="false" fo:background-color="#ffffff" fo:keep-with-next="always"/>
      <style:text-properties fo:color="#1f2328" style:font-name="Courier New" fo:font-family="'Courier New'" style:font-family-generic="roman" style:font-pitch="variable" fo:font-size="17pt" fo:font-weight="bold" style:font-name-asian="Courier New1" style:font-family-asian="'Courier New'" style:font-family-generic-asian="system" style:font-pitch-asian="variable" style:font-size-asian="17pt" style:font-weight-asian="bold" style:font-name-complex="Courier New1" style:font-family-complex="'Courier New'" style:font-family-generic-complex="system" style:font-pitch-complex="variable" style:font-size-complex="17pt" style:font-weight-complex="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normal"/>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font-weight-complex="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fo:font-size="12pt" style:text-underline-style="none"/>
    </style:style>
    <style:style style:name="ListLabel_20_11" style:display-name="ListLabel 11" style:family="text">
      <style:text-properties style:font-name="Courier New" fo:font-family="'Courier New'" style:font-family-generic="roman" style:font-pitch="variable" fo:font-size="12pt" style:text-underline-style="none"/>
    </style:style>
    <style:style style:name="ListLabel_20_12" style:display-name="ListLabel 12" style:family="text">
      <style:text-properties style:font-name="Courier New" fo:font-family="'Courier New'" style:font-family-generic="roman" style:font-pitch="variable" fo:font-size="12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fo:font-size="12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font-weight-complex="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urier New" fo:font-family="'Courier New'"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urier New" fo:font-family="'Courier New'"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urier New" fo:font-family="'Courier New'" style:font-family-generic="roman" style:font-pitch="variable" fo:font-size="12pt" style:text-underline-style="none" fo:font-weight="bold"/>
    </style:style>
    <style:style style:name="ListLabel_20_47" style:display-name="ListLabel 47" style:family="text">
      <style:text-properties style:font-name="Courier New" fo:font-family="'Courier New'"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font-name="Courier New" fo:font-family="'Courier New'" style:font-family-generic="roman" style:font-pitch="variable" fo:font-size="12pt" style:text-underline-style="solid" style:text-underline-width="auto" style:text-underline-color="font-color" fo:font-weight="bold" style:font-name-asian="Courier New1" style:font-family-asian="'Courier New'" style:font-family-generic-asian="system" style:font-pitch-asian="variable" style:font-size-asian="12pt" style:font-weight-asian="bold" style:font-name-complex="Courier New1" style:font-family-complex="'Courier New'" style:font-family-generic-complex="system" style:font-pitch-complex="variable" style:font-size-complex="12pt" style:font-weight-complex="bold"/>
    </style:style>
    <style:style style:name="ListLabel_20_56" style:display-name="ListLabel 56"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font-weight-complex="bold"/>
    </style:style>
    <style:style style:name="ListLabel_20_57" style:display-name="ListLabel 57" style:family="text">
      <style:text-properties fo:color="#1155cc" style:text-underline-style="solid" style:text-underline-width="auto" style:text-underline-color="font-color" fo:font-weight="bold" style:font-weight-asian="bold" style:font-weight-complex="bold"/>
    </style:style>
    <style:style style:name="ListLabel_20_58" style:display-name="ListLabel 5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0.6756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0.5in" fo:margin-left="1in" fo:margin-right="0.6756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21</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First_20_Page" style:display-name="First Page" style:page-layout-name="Mpm4" style:next-style-name="Standard">
      <style:footer>
        <text:p text:style-name="Standard"/>
      </style:footer>
    </style:master-page>
    <style:master-page style:name="Converted5" style:page-layout-name="Mpm5"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3" meta:paragraph-count="343" meta:word-count="3843" meta:character-count="29189" meta:non-whitespace-character-count="24100"/>
    <meta:generator>LibreOfficeDev/6.0.5.2$Linux_X86_64 LibreOffice_project/</meta:generator>
  </office:meta>
</office:document-meta>
</file>